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0695*"/>
    </style:style>
    <style:style style:name="Table1.B" style:family="table-column">
      <style:table-column-properties style:rel-column-width="4483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214*"/>
    </style:style>
    <style:style style:name="Table2.B" style:family="table-column">
      <style:table-column-properties style:rel-column-width="39321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21064*"/>
    </style:style>
    <style:style style:name="Table3.B" style:family="table-column">
      <style:table-column-properties style:rel-column-width="44470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0695*"/>
    </style:style>
    <style:style style:name="Table4.B" style:family="table-column">
      <style:table-column-properties style:rel-column-width="44839*"/>
    </style:style>
  </office:automatic-styles>
  <office:body>
    <office:text>
      <text:h text:style-name="Heading_20_1" text:outline-level="1"><text:bookmark-start text:name="axi-performance-monitor-ip-design-request-specification"/>AXI Performance Monitor IP — Design Request Specification<text:bookmark-end text:name="axi-performance-monitor-ip-design-request-specification"/></text:h>
      <text:p text:style-name="First_20_paragraph"><text:span text:style-name="T1">Purpose</text:span>: This document defines the functional behavior, operating rules, and constraints for implementing an <text:span text:style-name="T1">AXI performance monitor with bandwidth control and address protection</text:span> in Verilog/SystemVerilog, for <text:span text:style-name="T1">first delivery</text:span> to the SoC IP team.<text:line-break/><text:span text:style-name="T1">Audience</text:span>: SoC and IP design, verification, and software engineers (assumes first receipt of this IP).</text:p>
      <text:p text:style-name="Text_20_body"><text:span text:style-name="T1">Scope</text:span>: This document is the <text:span text:style-name="T1">single normative baseline</text:span> for functional and behavioral requirements of this IP. <text:span text:style-name="T1">Register bitfields and addresses, pin/port lists, timing/electrical constraints, and SoC integration procedures</text:span> are documented in <text:span text:style-name="T1">companion material supplied by the IP provider</text:span>, which MUST remain <text:span text:style-name="T1">consistent</text:span> with this specification.</text:p>
      <text:p text:style-name="Text_20_body"><text:span text:style-name="T1">Standalone delivery</text:span>: This package (Korean and English markdown plus the block-diagram image) is sufficient to convey the requirements; <text:span text:style-name="T1">no other repository markdown or internal documents need to be read.</text:span></text:p>
      <text:h text:style-name="Heading_20_3" text:outline-level="3"><text:bookmark-start text:name="recommended-delivery-bundle"/>Recommended delivery bundle<text:bookmark-end text:name="recommended-delivery-bund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request_for_design_busmon.md</text:span></text:p>
          </table:table-cell>
          <table:table-cell table:style-name="TableRowCell" office:value-type="string">
            <text:p text:style-name="Table_20_Contents">Korean specification (normative prose and tables).</text:p>
          </table:table-cell>
        </table:table-row>
        <table:table-row>
          <table:table-cell table:style-name="TableRowCell" office:value-type="string">
            <text:p text:style-name="Table_20_Contents"><text:span text:style-name="Source_Text">request_for_design_busmon_en.md</text:span></text:p>
          </table:table-cell>
          <table:table-cell table:style-name="TableRowCell" office:value-type="string">
            <text:p text:style-name="Table_20_Contents">English specification of the same content.</text:p>
          </table:table-cell>
        </table:table-row>
        <table:table-row>
          <table:table-cell table:style-name="TableRowCell" office:value-type="string">
            <text:p text:style-name="Table_20_Contents"><text:span text:style-name="Source_Text">busmon_architecture_overview.png</text:span></text:p>
          </table:table-cell>
          <table:table-cell table:style-name="TableRowCell" office:value-type="string">
            <text:p text:style-name="Table_20_Contents">§10 overview figure; keep <text:span text:style-name="T1">in the same folder</text:span> as the markdown (relative image link).</text:p>
          </table:table-cell>
        </table:table-row>
      </table:table>
      <text:p text:style-name="First_20_paragraph">You MAY generate Word/PDF from markdown. The Mermaid diagram in §10.2 may not render in all viewers; <text:span text:style-name="T1">§§4–9 and tables are normative.</text:span></text:p>
      <text:p text:style-name="Horizontal_20_Line"/>
      <text:h text:style-name="Heading_20_2" text:outline-level="2"><text:bookmark-start text:name="notation-mandatory-vs-designer-discretion"/>0. Notation: Mandatory vs Designer Discretion<text:bookmark-end text:name="notation-mandatory-vs-designer-discre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Term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MUST</text:span></text:p>
          </table:table-cell>
          <table:table-cell table:style-name="TableRowCell" office:value-type="string">
            <text:p text:style-name="Table_20_Contents">Implement and verify as stated in this document.</text:p>
          </table:table-cell>
        </table:table-row>
        <table:table-row>
          <table:table-cell table:style-name="TableRowCell" office:value-type="string">
            <text:p text:style-name="Table_20_Contents"><text:span text:style-name="T1">SHOULD</text:span></text:p>
          </table:table-cell>
          <table:table-cell table:style-name="TableRowCell" office:value-type="string">
            <text:p text:style-name="Table_20_Contents">Preferred practice; may be replaced if quality is equivalent or better.</text:p>
          </table:table-cell>
        </table:table-row>
        <table:table-row>
          <table:table-cell table:style-name="TableRowCell" office:value-type="string">
            <text:p text:style-name="Table_20_Contents"><text:span text:style-name="T1">MAY</text:span></text:p>
          </table:table-cell>
          <table:table-cell table:style-name="TableRowCell" office:value-type="string">
            <text:p text:style-name="Table_20_Contents">Microarchitecture, implementation style, and detailed parameters are at designer discretion, provided <text:span text:style-name="T1">required behavior and AXI protocol compliance</text:span> are preserved.</text:p>
          </table:table-cell>
        </table:table-row>
      </table:table>
      <text:p text:style-name="Horizontal_20_Line"/>
      <text:h text:style-name="Heading_20_2" text:outline-level="2"><text:bookmark-start text:name="design-goals-must"/>1. Design Goals (MUST)<text:bookmark-end text:name="design-goals-must"/></text:h>
      <text:list text:style-name="L1">
        <text:list-item>
          <text:p text:style-name="P1">Deliver an <text:span text:style-name="T1">AXI performance monitor IP</text:span> suitable for production-quality use.</text:p>
        </text:list-item>
        <text:list-item>
          <text:p text:style-name="P1"><text:span text:style-name="T1">Bandwidth/latency logging</text:span>, <text:span text:style-name="T1">bandwidth throttling (multiple threshold modes)</text:span>, <text:span text:style-name="T1">external throttle control</text:span>, and <text:span text:style-name="T1">address protection</text:span> MUST be controllable and observable via registers within one IP.</text:p>
        </text:list-item>
        <text:list-item>
          <text:p text:style-name="P1">Provide pipeline and timing margin appropriate for high-frequency operation.</text:p>
        </text:list-item>
      </text:list>
      <text:p text:style-name="Horizontal_20_Line"/>
      <text:h text:style-name="Heading_20_2" text:outline-level="2"><text:bookmark-start text:name="interfaces-must"/>2. Interfaces (MUST)<text:bookmark-end text:name="interfaces-must"/></text:h>
      <text:h text:style-name="Heading_20_3" text:outline-level="3"><text:bookmark-start text:name="axi"/>2.1 AXI<text:bookmark-end text:name="axi"/></text:h>
      <text:list text:style-name="L2">
        <text:list-item>
          <text:p text:style-name="P2"><text:span text:style-name="T1">AXI Master Up / Master Down</text:span> (or Slave Up / Master Down naming <text:span text:style-name="T1">MAY</text:span> vary).</text:p>
          <text:list text:style-name="L3">
            <text:list-item>
              <text:p text:style-name="P3">Upstream and downstream use the <text:span text:style-name="T1">same data width</text:span> and <text:span text:style-name="T1">same clock</text:span>.<text:line-break/></text:p>
            </text:list-item>
          </text:list>
        </text:list-item>
        <text:list-item>
          <text:p text:style-name="P2">Default data width is <text:span text:style-name="T1">256 bit</text:span> (other defaults <text:span text:style-name="T1">MAY</text:span> use parameters; 256 is the default).<text:line-break/></text:p>
        </text:list-item>
        <text:list-item>
          <text:p text:style-name="P2"><text:span text:style-name="T1">Optional register slices</text:span> on Up and/or Down MUST be selectable via <text:span text:style-name="T1">parameters</text:span>.</text:p>
        </text:list-item>
      </text:list>
      <text:h text:style-name="Heading_20_3" text:outline-level="3"><text:bookmark-start text:name="control-status-apb"/>2.2 Control / Status — APB<text:bookmark-end text:name="control-status-apb"/></text:h>
      <text:list text:style-name="L4">
        <text:list-item>
          <text:p text:style-name="P4">Control/status registers are accessed through an <text:span text:style-name="T1">APB 32-bit</text:span> slave interface.<text:line-break/></text:p>
        </text:list-item>
        <text:list-item>
          <text:p text:style-name="P4"><text:span text:style-name="Source_Text">pstrb</text:span> MAY be assumed <text:span text:style-name="T1">fixed to 0xF</text:span>.<text:line-break/></text:p>
        </text:list-item>
        <text:list-item>
          <text:p text:style-name="P4">Same clock domain as the AXI master interface.</text:p>
        </text:list-item>
      </text:list>
      <text:h text:style-name="Heading_20_3" text:outline-level="3"><text:bookmark-start text:name="interrupt"/>2.3 Interrupt<text:bookmark-end text:name="interrupt"/></text:h>
      <text:list text:style-name="L5">
        <text:list-item>
          <text:p text:style-name="P5"><text:span text:style-name="T1">One interrupt output</text:span> (shared across logging events or masked into one line — sources and mask bits are defined in §8 and in the <text:span text:style-name="T1">companion register definition</text:span> for this IP).</text:p>
        </text:list-item>
      </text:list>
      <text:h text:style-name="Heading_20_3" text:outline-level="3"><text:bookmark-start text:name="off-bus-input-external-throttle-control"/>2.4 Off-bus Input — External Throttle Control<text:bookmark-end text:name="off-bus-input-external-throttle-control"/></text:h>
      <text:p text:style-name="First_20_paragraph"><text:span text:style-name="T1">MUST</text:span></text:p>
      <text:list text:style-name="L6">
        <text:list-item>
          <text:p text:style-name="P6">Provide a <text:span text:style-name="T1">2-bit</text:span> input port <text:span text:style-name="Source_Text">request_throttle[1:0]</text:span> separate from AXI bus ports.<text:line-break/></text:p>
        </text:list-item>
        <text:list-item>
          <text:p text:style-name="P6">Define legal encodings as <text:span text:style-name="T1">0 through 3</text:span> (treatment of unused encodings is <text:span text:style-name="T1">MAY</text:span> — document as ignore or same as 0).<text:line-break/></text:p>
        </text:list-item>
        <text:list-item>
          <text:p text:style-name="P6"><text:span text:style-name="T1">SHOULD</text:span> operate in the <text:span text:style-name="T1">same clock domain</text:span> as AXI. If asynchronous, <text:span text:style-name="T1">MAY</text:span> add synchronizers; <text:span text:style-name="T1">MUST</text:span> consider metastability.</text:p>
        </text:list-item>
      </text:list>
      <text:p text:style-name="First_20_paragraph"><text:span text:style-name="T1">MAY</text:span></text:p>
      <text:list text:style-name="L7">
        <text:list-item>
          <text:p text:style-name="P7">Port naming and module-level pin prefixes.</text:p>
        </text:list-item>
      </text:list>
      <text:p text:style-name="Horizontal_20_Line"/>
      <text:h text:style-name="Heading_20_2" text:outline-level="2"><text:bookmark-start text:name="per-feature-enable-disable-must"/>3. Per-Feature Enable / Disable (MUST)<text:bookmark-end text:name="per-feature-enable-disable-must"/></text:h>
      <text:p text:style-name="First_20_paragraph">Control registers MUST provide <text:span text:style-name="T1">per-feature enable/disable</text:span> fields. Example split (field names and bit positions <text:span text:style-name="T1">MAY</text:span> vary):</text:p>
      <text:list text:style-name="L8">
        <text:list-item>
          <text:p text:style-name="P8">Bandwidth logging<text:line-break/></text:p>
        </text:list-item>
        <text:list-item>
          <text:p text:style-name="P8">Latency logging (single-tx / multi-tx latency via sub-enables or combined statistics in period — §5.2)<text:line-break/></text:p>
        </text:list-item>
        <text:list-item>
          <text:p text:style-name="P8">Bandwidth throttling<text:line-break/></text:p>
        </text:list-item>
        <text:list-item>
          <text:p text:style-name="P8"><text:span text:style-name="T1">External throttle control</text:span> (<text:span text:style-name="Source_Text">request_throttle</text:span> path — §6.3)<text:line-break/></text:p>
        </text:list-item>
        <text:list-item>
          <text:p text:style-name="P8">Address protection</text:p>
        </text:list-item>
      </text:list>
      <text:p text:style-name="First_20_paragraph"><text:span text:style-name="T1">SHOULD</text:span> reduce unnecessary clock toggles when features are off.</text:p>
      <text:p text:style-name="Horizontal_20_Line"/>
      <text:h text:style-name="Heading_20_2" text:outline-level="2"><text:bookmark-start text:name="transaction-filters-must"/>4. Transaction Filters (MUST)<text:bookmark-end text:name="transaction-filters-must"/></text:h>
      <text:p text:style-name="First_20_paragraph">Used consistently for logging, latency measurement, and <text:span text:style-name="T1">throttle scope</text:span>. Filters are combined with <text:span text:style-name="T1">logical AND</text:span>: a transaction is included only if <text:span text:style-name="T1">all</text:span> of address, ID, and direction conditions match (when the relevant feature is enabled).</text:p>
      <text:h text:style-name="Heading_20_3" text:outline-level="3"><text:bookmark-start text:name="address-filter"/>4.1 Address Filter<text:bookmark-end text:name="address-filter"/></text:h>
      <text:p text:style-name="First_20_paragraph"><text:span text:style-name="T1">MUST</text:span></text:p>
      <text:list text:style-name="L9">
        <text:list-item>
          <text:p text:style-name="P9">Through control registers, allow monitoring only transactions in a <text:span text:style-name="T1">start address + size</text:span> (or start/end) range, or <text:span text:style-name="T1">full address space</text:span> tracking.</text:p>
        </text:list-item>
      </text:list>
      <text:p text:style-name="First_20_paragraph"><text:span text:style-name="T1">MAY</text:span></text:p>
      <text:list text:style-name="L10">
        <text:list-item>
          <text:p text:style-name="P10">Address compare implementation (alignment rules, upper-bit masks, etc.).</text:p>
        </text:list-item>
      </text:list>
      <text:h text:style-name="Heading_20_3" text:outline-level="3"><text:bookmark-start text:name="id-filter"/>4.2 ID Filter<text:bookmark-end text:name="id-filter"/></text:h>
      <text:p text:style-name="First_20_paragraph"><text:span text:style-name="T1">MUST</text:span></text:p>
      <text:list text:style-name="L11">
        <text:list-item>
          <text:p text:style-name="P11">Support these modes for <text:span text:style-name="T1">AXI ID</text:span> (ARID/AWID width per AXI parameters), selectable by register:</text:p>
          <text:list text:style-name="L12">
            <text:list-item>
              <text:p text:style-name="P12"><text:span text:style-name="T1">Whitelist</text:span> — match one or more ID values (count and width upper bounds are <text:span text:style-name="T1">design parameters</text:span>).<text:line-break/></text:p>
            </text:list-item>
            <text:list-item>
              <text:p text:style-name="P12"><text:span text:style-name="T1">Blacklist</text:span> — exclude listed IDs.<text:line-break/></text:p>
            </text:list-item>
            <text:list-item>
              <text:p text:style-name="P12"><text:span text:style-name="T1">All IDs</text:span> (same effect as ID filter off).</text:p>
            </text:list-item>
          </text:list>
        </text:list-item>
      </text:list>
      <text:p text:style-name="First_20_paragraph"><text:span text:style-name="T1">MAY</text:span></text:p>
      <text:list text:style-name="L13">
        <text:list-item>
          <text:p text:style-name="P13">Number of whitelist/blacklist entries; mask/range vs exact match lists.</text:p>
        </text:list-item>
      </text:list>
      <text:h text:style-name="Heading_20_3" text:outline-level="3"><text:bookmark-start text:name="direction-filter"/>4.3 Direction Filter<text:bookmark-end text:name="direction-filter"/></text:h>
      <text:p text:style-name="First_20_paragraph"><text:span text:style-name="T1">MUST</text:span></text:p>
      <text:list text:style-name="L14">
        <text:list-item>
          <text:p text:style-name="P14">Register-selectable:</text:p>
          <text:list text:style-name="L15">
            <text:list-item>
              <text:p text:style-name="P15"><text:span text:style-name="T1">Read only</text:span><text:line-break/></text:p>
            </text:list-item>
            <text:list-item>
              <text:p text:style-name="P15"><text:span text:style-name="T1">Write only</text:span><text:line-break/></text:p>
            </text:list-item>
            <text:list-item>
              <text:p text:style-name="P15"><text:span text:style-name="T1">Read and Write</text:span></text:p>
            </text:list-item>
          </text:list>
        </text:list-item>
      </text:list>
      <text:p text:style-name="First_20_paragraph"><text:span text:style-name="T1">MAY</text:span></text:p>
      <text:list text:style-name="L16">
        <text:list-item>
          <text:p text:style-name="P16">Whether “Write” covers AW only vs AW+W channels per AXI rules.</text:p>
        </text:list-item>
      </text:list>
      <text:h text:style-name="Heading_20_3" text:outline-level="3"><text:bookmark-start text:name="applicability-summary-must"/>4.4 Applicability Summary (MUST)<text:bookmark-end text:name="applicability-summary-must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eature</text:p>
            </table:table-cell>
            <table:table-cell table:style-name="TableHeaderRowCell" office:value-type="string">
              <text:p text:style-name="Table_20_Heading">Filter combin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Bandwidth logging</text:p>
          </table:table-cell>
          <table:table-cell table:style-name="TableRowCell" office:value-type="string">
            <text:p text:style-name="Table_20_Contents">Address + ID + DIRECTION</text:p>
          </table:table-cell>
        </table:table-row>
        <table:table-row>
          <table:table-cell table:style-name="TableRowCell" office:value-type="string">
            <text:p text:style-name="Table_20_Contents">Latency logging (§5)</text:p>
          </table:table-cell>
          <table:table-cell table:style-name="TableRowCell" office:value-type="string">
            <text:p text:style-name="Table_20_Contents">Same</text:p>
          </table:table-cell>
        </table:table-row>
        <table:table-row>
          <table:table-cell table:style-name="TableRowCell" office:value-type="string">
            <text:p text:style-name="Table_20_Contents">Bandwidth throttling (§6)</text:p>
          </table:table-cell>
          <table:table-cell table:style-name="TableRowCell" office:value-type="string">
            <text:p text:style-name="Table_20_Contents">Address + ID + DIRECTION (same combination as latency logging)</text:p>
          </table:table-cell>
        </table:table-row>
      </table:table>
      <text:p text:style-name="Horizontal_20_Line"/>
      <text:h text:style-name="Heading_20_2" text:outline-level="2"><text:bookmark-start text:name="performance-logging"/>5. Performance Logging<text:bookmark-end text:name="performance-logging"/></text:h>
      <text:h text:style-name="Heading_20_3" text:outline-level="3"><text:bookmark-start text:name="bandwidth-logging"/>5.1 Bandwidth Logging<text:bookmark-end text:name="bandwidth-logging"/></text:h>
      <text:p text:style-name="First_20_paragraph"><text:span text:style-name="T1">Summary (MUST)</text:span></text:p>
      <text:list text:style-name="L17">
        <text:list-item>
          <text:p text:style-name="P17"><text:span text:style-name="T1">Period</text:span>: Select cycle count or transaction count (AW+AR handshake definition in register documentation). Repeats while enabled.<text:line-break/></text:p>
        </text:list-item>
        <text:list-item>
          <text:p text:style-name="P17"><text:span text:style-name="T1">Measurement</text:span>: Derive bytes from <text:span text:style-name="Source_Text">AxSIZE × burst length</text:span>, etc.; accumulate Write and Read separately; push to FIFO on period end.<text:line-break/></text:p>
        </text:list-item>
        <text:list-item>
          <text:p text:style-name="P17"><text:span text:style-name="T1">FIFO</text:span>: Depth is a parameter; <text:span text:style-name="T1">Even/Odd</text:span> banks; switch storage bank every <text:span text:style-name="T1">N</text:span> periods (<text:span text:style-name="Source_Text">N</text:span> &lt; depth, set by control register).<text:line-break/></text:p>
        </text:list-item>
        <text:list-item>
          <text:p text:style-name="P17"><text:span text:style-name="T1">Interrupt</text:span>: Optional level interrupt every N periods; mask via interrupt enable.<text:line-break/></text:p>
        </text:list-item>
        <text:list-item>
          <text:p text:style-name="P17"><text:span text:style-name="T1">Status</text:span>: Current Even/Odd write target; which FIFO bank was written before the last interrupt.<text:line-break/></text:p>
        </text:list-item>
        <text:list-item>
          <text:p text:style-name="P17"><text:span text:style-name="T1">Filters</text:span>: Count eligibility per §4.</text:p>
        </text:list-item>
      </text:list>
      <text:p text:style-name="First_20_paragraph"><text:span text:style-name="T1">MAY</text:span></text:p>
      <text:list text:style-name="L18">
        <text:list-item>
          <text:p text:style-name="P18">FIFO implementation (memory type), metadata fields.</text:p>
        </text:list-item>
      </text:list>
      <text:p text:style-name="Horizontal_20_Line"/>
      <text:h text:style-name="Heading_20_3" text:outline-level="3"><text:bookmark-start text:name="latency-logging"/>5.2 Latency Logging<text:bookmark-end text:name="latency-logging"/></text:h>
      <text:h text:style-name="Heading_20_4" text:outline-level="4"><text:bookmark-start text:name="period-and-average-storage"/>5.2.1 Period and Average Storage<text:bookmark-end text:name="period-and-average-storage"/></text:h>
      <text:p text:style-name="First_20_paragraph"><text:span text:style-name="T1">MUST</text:span></text:p>
      <text:list text:style-name="L19">
        <text:list-item>
          <text:p text:style-name="P19">Use the <text:span text:style-name="T1">same period registers</text:span> as bandwidth logging.<text:line-break/></text:p>
        </text:list-item>
        <text:list-item>
          <text:p text:style-name="P19"><text:span text:style-name="T1">Single-transaction</text:span> latency: store <text:span text:style-name="T1">per-period averages</text:span> only (sum / transaction count).<text:line-break/></text:p>
        </text:list-item>
        <text:list-item>
          <text:p text:style-name="P19"><text:span text:style-name="T1">Write latency</text:span>: cycles from completed AW handshake until first <text:span text:style-name="T1">B</text:span> acceptance.<text:line-break/></text:p>
        </text:list-item>
        <text:list-item>
          <text:p text:style-name="P19"><text:span text:style-name="T1">Read latency</text:span>:</text:p>
          <text:list text:style-name="L20">
            <text:list-item>
              <text:p text:style-name="P20">From AR until first <text:span text:style-name="T1">RVALID</text:span><text:line-break/></text:p>
            </text:list-item>
            <text:list-item>
              <text:p text:style-name="P20">From AR until last <text:span text:style-name="T1">RLAST &amp; RVALID</text:span> (both statistics separately).<text:line-break/></text:p>
            </text:list-item>
          </text:list>
        </text:list-item>
        <text:list-item>
          <text:p text:style-name="P19">Even/Odd FIFO and N-period switching: same policy as bandwidth logging.</text:p>
        </text:list-item>
      </text:list>
      <text:p text:style-name="First_20_paragraph"><text:span text:style-name="T1">MAY</text:span></text:p>
      <text:list text:style-name="L21">
        <text:list-item>
          <text:p text:style-name="P21">Internal structures (e.g. per-ID queues) as appropriate for the implementation.</text:p>
        </text:list-item>
      </text:list>
      <text:h text:style-name="Heading_20_4" text:outline-level="4"><text:bookmark-start text:name="read-write-multi-transaction-latency"/>5.2.2 Read / Write Multi-Transaction Latency<text:bookmark-end text:name="read-write-multi-transaction-latency"/></text:h>
      <text:p text:style-name="First_20_paragraph"><text:span text:style-name="T1">Goal</text:span>: When outstanding transactions overlap, store <text:span text:style-name="T1">end-to-end delay of a “burst segment”</text:span> and <text:span text:style-name="T1">accumulated bytes</text:span> consistent with the Period/FIFO policy.</text:p>
      <text:p text:style-name="Text_20_body"><text:span text:style-name="T1">MUST — Read multi-transaction latency</text:span></text:p>
      <text:list text:style-name="L22">
        <text:list-item>
          <text:p text:style-name="P22"><text:span text:style-name="T1">Segment start</text:span>: For a filtered Read, when <text:span text:style-name="T1">no outstanding Read</text:span> exists, start the latency counter when <text:span text:style-name="T1">ARVALID &amp; ARREADY</text:span> complete.<text:line-break/></text:p>
        </text:list-item>
        <text:list-item>
          <text:p text:style-name="P22"><text:span text:style-name="T1">Segment end</text:span>: For the <text:span text:style-name="T1">last Read transaction</text:span> of that segment, stop when <text:span text:style-name="T1">RLAST &amp; RVALID &amp; RREADY</text:span> complete.<text:line-break/></text:p>
        </text:list-item>
        <text:list-item>
          <text:p text:style-name="P22"><text:span text:style-name="T1">Storage</text:span>: On completion (or per §5.2.3 at period boundaries), store <text:span text:style-name="T1">byte count</text:span> and <text:span text:style-name="T1">period (cycle count)</text:span> per the chosen storage mode (FIFO / average, etc.) using the same <text:span text:style-name="T1">Even/Odd FIFO scheme</text:span> as §5.1 and §5.2.1.<text:line-break/></text:p>
        </text:list-item>
        <text:list-item>
          <text:p text:style-name="P22">If <text:span text:style-name="T1">outstanding Reads already exist</text:span> when a new Read starts: <text:span text:style-name="T1">do not reset</text:span> the multi-transaction latency counter; <text:span text:style-name="T1">only add bytes</text:span> (same segment).</text:p>
        </text:list-item>
      </text:list>
      <text:p text:style-name="First_20_paragraph"><text:span text:style-name="T1">MUST — Write multi-transaction latency</text:span></text:p>
      <text:list text:style-name="L23">
        <text:list-item>
          <text:p text:style-name="P23">Same policy as Read. <text:span text:style-name="T1">Segment start</text:span>: first valid request when no outstanding Write (typically <text:span text:style-name="T1">AW</text:span> or first valid per protocol). <text:span text:style-name="T1">Segment end</text:span>: <text:span text:style-name="T1">BVALID &amp; BREADY</text:span> for the last Write of the segment.<text:line-break/></text:p>
        </text:list-item>
        <text:list-item>
          <text:p text:style-name="P23">Additional Writes in the segment add bytes <text:span text:style-name="T1">without resetting</text:span> the counter.</text:p>
        </text:list-item>
      </text:list>
      <text:p text:style-name="First_20_paragraph"><text:span text:style-name="T1">MAY</text:span></text:p>
      <text:list text:style-name="L24">
        <text:list-item>
          <text:p text:style-name="P24">Byte accounting for Write multi segments (AW-only vs AW+W data) — must stay <text:span text:style-name="T1">consistent</text:span> with document-wide byte definitions.<text:line-break/></text:p>
        </text:list-item>
        <text:list-item>
          <text:p text:style-name="P24">Whether multi-transaction stats go into period <text:span text:style-name="T1">averages</text:span> or <text:span text:style-name="T1">per-sample FIFO</text:span> — specify in register map.</text:p>
        </text:list-item>
      </text:list>
      <text:h text:style-name="Heading_20_4" text:outline-level="4"><text:bookmark-start text:name="multi-transaction-statistics-vs-period-must-partial-may"/>5.2.3 Multi-Transaction Statistics vs Period (MUST / partial MAY)<text:bookmark-end text:name="multi-transaction-statistics-vs-period-must-partial-may"/></text:h>
      <text:p text:style-name="First_20_paragraph"><text:span text:style-name="T1">MUST</text:span></text:p>
      <text:list text:style-name="L25">
        <text:list-item>
          <text:p text:style-name="P25">Single- and multi-transaction latency stats include only transactions passing <text:span text:style-name="T1">§4 filters</text:span>.<text:line-break/></text:p>
        </text:list-item>
        <text:list-item>
          <text:p text:style-name="P25"><text:span text:style-name="T1">MAY</text:span> share the same period timebase as bandwidth/latency logging.</text:p>
        </text:list-item>
      </text:list>
      <text:p text:style-name="First_20_paragraph"><text:span text:style-name="T1">MAY</text:span></text:p>
      <text:list text:style-name="L26">
        <text:list-item>
          <text:p text:style-name="P26">If multiple multi-transaction segments complete in one period, whether to store <text:span text:style-name="T1">average, sum, or max</text:span> — define in register map.</text:p>
        </text:list-item>
      </text:list>
      <text:p text:style-name="Horizontal_20_Line"/>
      <text:h text:style-name="Heading_20_2" text:outline-level="2"><text:bookmark-start text:name="bandwidth-throttling"/>6. Bandwidth Throttling<text:bookmark-end text:name="bandwidth-throttling"/></text:h>
      <text:h text:style-name="Heading_20_3" text:outline-level="3"><text:bookmark-start text:name="common"/>6.1 Common<text:bookmark-end text:name="common"/></text:h>
      <text:p text:style-name="First_20_paragraph"><text:span text:style-name="T1">MUST</text:span></text:p>
      <text:list text:style-name="L27">
        <text:list-item>
          <text:p text:style-name="P27">Provide a throttle period register separate from logging period (<text:span text:style-name="Source_Text">period_throttle</text:span>, naming <text:span text:style-name="T1">MAY</text:span> vary).<text:line-break/></text:p>
        </text:list-item>
        <text:list-item>
          <text:p text:style-name="P27">Byte accounting for throttling uses the <text:span text:style-name="T1">same byte rules</text:span> as logging.<text:line-break/></text:p>
        </text:list-item>
        <text:list-item>
          <text:p text:style-name="P27"><text:span text:style-name="T1">Scope</text:span>: Throttling applies only to transactions satisfying §4 <text:span text:style-name="T1">address + ID + DIRECTION</text:span>.<text:line-break/></text:p>
        </text:list-item>
        <text:list-item>
          <text:p text:style-name="P27">Insert delay to limit bandwidth.</text:p>
        </text:list-item>
      </text:list>
      <text:p text:style-name="First_20_paragraph"><text:span text:style-name="T1">MAY</text:span></text:p>
      <text:list text:style-name="L28">
        <text:list-item>
          <text:p text:style-name="P28">Sliding vs fixed aggregation windows.</text:p>
        </text:list-item>
      </text:list>
      <text:p text:style-name="Horizontal_20_Line"/>
      <text:h text:style-name="Heading_20_3" text:outline-level="3"><text:bookmark-start text:name="threshold-mode-options-must"/>6.2 Threshold Mode Options (MUST)<text:bookmark-end text:name="threshold-mode-options-must"/></text:h>
      <text:p text:style-name="First_20_paragraph">Selectable <text:span text:style-name="T1">dynamically</text:span> by register.</text:p>
      <text:h text:style-name="Heading_20_4" text:outline-level="4"><text:bookmark-start text:name="static-threshold"/>6.2.1 Static Threshold<text:bookmark-end text:name="static-threshold"/></text:h>
      <text:p text:style-name="First_20_paragraph"><text:span text:style-name="T1">MUST</text:span></text:p>
      <text:list text:style-name="L29">
        <text:list-item>
          <text:p text:style-name="P29">Each <text:span text:style-name="Source_Text">period_throttle</text:span> window, if accumulated bytes exceed the configured <text:span text:style-name="T1">threshold</text:span>, insert delay on AW/AR (and §6.4) <text:span text:style-name="T1">acceptance timing</text:span> to reduce bandwidth.<text:line-break/></text:p>
        </text:list-item>
        <text:list-item>
          <text:p text:style-name="P29"><text:span text:style-name="T1">Different delay values</text:span> may be set for AW vs AR.</text:p>
        </text:list-item>
      </text:list>
      <text:h text:style-name="Heading_20_4" text:outline-level="4"><text:bookmark-start text:name="credit-based-threshold"/>6.2.2 Credit-Based Threshold<text:bookmark-end text:name="credit-based-threshold"/></text:h>
      <text:p text:style-name="First_20_paragraph"><text:span text:style-name="T1">MUST — Concepts</text:span></text:p>
      <text:list text:style-name="L30">
        <text:list-item>
          <text:p text:style-name="P30"><text:span text:style-name="T1">credit_period</text:span>: Independent of logging/static throttle period; register-programmable.<text:line-break/></text:p>
        </text:list-item>
        <text:list-item>
          <text:p text:style-name="P30">Each <text:span text:style-name="T1">credit_period</text:span>, add <text:span text:style-name="T1">number_of_credit</text:span> (register) to the <text:span text:style-name="T1">accumulated</text:span> credit pool.<text:line-break/></text:p>
        </text:list-item>
        <text:list-item>
          <text:p text:style-name="P30"><text:span text:style-name="T1">Clamp</text:span> accumulation to a <text:span text:style-name="T1">maximum</text:span> (register or parameter).<text:line-break/></text:p>
        </text:list-item>
        <text:list-item>
          <text:p text:style-name="P30">On <text:span text:style-name="T1">transaction request acceptance</text:span> (<text:span text:style-name="T1">VALID &amp; READY</text:span> on that channel — document per channel).<text:line-break/></text:p>
        </text:list-item>
        <text:list-item>
          <text:p text:style-name="P30">Debit amount = <text:span text:style-name="T1">request bytes</text:span> right-shifted by <text:span text:style-name="T1">credit_divider</text:span>, i.e. integer result of <text:span text:style-name="T1">bytes / 2^credit_divider</text:span> (floor division; <text:span text:style-name="T2">bytes</text:span> = transaction byte count).<text:line-break/></text:p>
        </text:list-item>
        <text:list-item>
          <text:p text:style-name="P30"><text:span text:style-name="T1">Never</text:span> let debit drive balance <text:span text:style-name="T1">below zero</text:span> (insufficient credit → §6.2.3).<text:line-break/></text:p>
        </text:list-item>
        <text:list-item>
          <text:p text:style-name="P30"><text:span text:style-name="T1">Separate</text:span> credit pools for <text:span text:style-name="T1">Read</text:span> and <text:span text:style-name="T1">Write</text:span>.</text:p>
        </text:list-item>
      </text:list>
      <text:p text:style-name="First_20_paragraph"><text:span text:style-name="T1">MAY</text:span></text:p>
      <text:list text:style-name="L31">
        <text:list-item>
          <text:p text:style-name="P31">Credit counter width; ordering when multiple transactions debit in one cycle.</text:p>
        </text:list-item>
      </text:list>
      <text:h text:style-name="Heading_20_4" text:outline-level="4"><text:bookmark-start text:name="insufficient-credit-delay-must"/>6.2.3 Insufficient Credit — Delay (MUST)<text:bookmark-end text:name="insufficient-credit-delay-must"/></text:h>
      <text:p text:style-name="First_20_paragraph"><text:span text:style-name="T1">MUST</text:span></text:p>
      <text:list text:style-name="L32">
        <text:list-item>
          <text:p text:style-name="P32">If credit is insufficient, <text:span text:style-name="T1">delay acceptance</text:span> to limit bandwidth.<text:line-break/></text:p>
        </text:list-item>
        <text:list-item>
          <text:p text:style-name="P32">Apply <text:span text:style-name="T1">independently</text:span> to Read and Write paths (matching separate credits).</text:p>
        </text:list-item>
      </text:list>
      <text:p text:style-name="Horizontal_20_Line"/>
      <text:h text:style-name="Heading_20_3" text:outline-level="3"><text:bookmark-start text:name="external-throttle-control"/>6.3 External Throttle Control<text:bookmark-end text:name="external-throttle-control"/></text:h>
      <text:p text:style-name="First_20_paragraph">Receive throttle intent on <text:span text:style-name="T1">pins</text:span> separate from AXI, and apply insertion delay on the <text:span text:style-name="T1">request path</text:span> using <text:span text:style-name="T1">delay registers independent</text:span> of §6.2 and §6.4.</text:p>
      <text:h text:style-name="Heading_20_4" text:outline-level="4"><text:bookmark-start text:name="input-semantics-must"/>6.3.1 Input Semantics (MUST)<text:bookmark-end text:name="input-semantics-must"/></text:h>
      <text:p text:style-name="First_20_paragraph"><text:span text:style-name="T1">MUST</text:span></text:p>
      <text:list text:style-name="L33">
        <text:list-item>
          <text:p text:style-name="P33">Port <text:span text:style-name="Source_Text">request_throttle[1:0]</text:span> (§2.4).<text:line-break/></text:p>
        </text:list-item>
        <text:list-item>
          <text:p text:style-name="P33"><text:span text:style-name="Source_Text">request_throttle == 0</text:span>: No <text:span text:style-name="T1">additional</text:span> delay from this input (even if feature enabled).<text:line-break/></text:p>
        </text:list-item>
        <text:list-item>
          <text:p text:style-name="P33"><text:span text:style-name="Source_Text">request_throttle == 1</text:span><text:span text:style-name="T1">, </text:span><text:span text:style-name="Source_Text">2</text:span><text:span text:style-name="T1">, </text:span><text:span text:style-name="Source_Text">3</text:span>: Each selects a <text:span text:style-name="T1">different delay</text:span> on the <text:span text:style-name="T1">request acceptance</text:span> path. Delays are <text:span text:style-name="T1">register-programmable</text:span> and <text:span text:style-name="T1">MUST</text:span> use registers <text:span text:style-name="T1">separate</text:span> from AW/AR/W delay and credit settings in §6.2 and §6.4 — e.g. <text:span text:style-name="T1">three dedicated registers</text:span> (or equivalent) for encodings 1–3.<text:line-break/></text:p>
        </text:list-item>
        <text:list-item>
          <text:p text:style-name="P33"><text:span text:style-name="T1">Enable/disable</text:span> of this feature <text:span text:style-name="T1">MUST</text:span> be dynamically programmable via APB. When disabled, <text:span text:style-name="Source_Text">request_throttle</text:span> <text:span text:style-name="T1">MAY</text:span> be ignored (<text:span text:style-name="T1">SHOULD</text:span> document).</text:p>
        </text:list-item>
      </text:list>
      <text:p text:style-name="First_20_paragraph"><text:span text:style-name="T1">MAY</text:span></text:p>
      <text:list text:style-name="L34">
        <text:list-item>
          <text:p text:style-name="P34">Scope of “request signals”: typically AR/AW address-phase acceptance; extending to W/R response channels is <text:span text:style-name="T1">MAY</text:span> — <text:span text:style-name="T1">document</text:span> in register map.<text:line-break/></text:p>
        </text:list-item>
        <text:list-item>
          <text:p text:style-name="P34">Three separate registers vs encoded table for delays 1–3.</text:p>
        </text:list-item>
      </text:list>
      <text:h text:style-name="Heading_20_4" text:outline-level="4"><text:bookmark-start text:name="interaction-with-internal-bandwidth-throttling-must-may"/>6.3.2 Interaction with Internal Bandwidth Throttling (MUST / MAY)<text:bookmark-end text:name="interaction-with-internal-bandwidth-throttling-must-may"/></text:h>
      <text:p text:style-name="First_20_paragraph"><text:span text:style-name="T1">MUST</text:span></text:p>
      <text:list text:style-name="L35">
        <text:list-item>
          <text:p text:style-name="P35">When external throttle and §6.2 internal throttling are <text:span text:style-name="T1">both</text:span> active, combined delay <text:span text:style-name="T1">MUST</text:span> preserve AXI <text:span text:style-name="T1">protocol</text:span> and avoid <text:span text:style-name="T1">deadlock</text:span>.</text:p>
        </text:list-item>
      </text:list>
      <text:p text:style-name="First_20_paragraph"><text:span text:style-name="T1">MAY</text:span></text:p>
      <text:list text:style-name="L36">
        <text:list-item>
          <text:p text:style-name="P36">Rules for <text:span text:style-name="T1">sum, max, priority</text:span> — document in register map / implementation.</text:p>
        </text:list-item>
      </text:list>
      <text:h text:style-name="Heading_20_4" text:outline-level="4"><text:bookmark-start text:name="scope-may"/>6.3.3 Scope (MAY)<text:bookmark-end text:name="scope-may"/></text:h>
      <text:list text:style-name="L37">
        <text:list-item>
          <text:p text:style-name="P37">Whether §4 filters also gate external throttle is <text:span text:style-name="T1">MAY</text:span>; optional register to select scope is <text:span text:style-name="T1">MAY</text:span>. Implementations that apply external throttle <text:span text:style-name="T1">globally</text:span> (all transactions) are allowed.</text:p>
        </text:list-item>
      </text:list>
      <text:p text:style-name="Horizontal_20_Line"/>
      <text:h text:style-name="Heading_20_3" text:outline-level="3"><text:bookmark-start text:name="write-path-wready-delay"/>6.4 Write Path — WREADY Delay<text:bookmark-end text:name="write-path-wready-delay"/></text:h>
      <text:p text:style-name="First_20_paragraph"><text:span text:style-name="T1">MUST</text:span></text:p>
      <text:list text:style-name="L38">
        <text:list-item>
          <text:p text:style-name="P38">Support additional <text:span text:style-name="T1">WREADY</text:span> delay as part of throttling write data.<text:line-break/></text:p>
        </text:list-item>
        <text:list-item>
          <text:p text:style-name="P38">Delay magnitude <text:span text:style-name="T1">MUST</text:span> be a <text:span text:style-name="T1">separate register</text:span>.<text:line-break/></text:p>
        </text:list-item>
        <text:list-item>
          <text:p text:style-name="P38">Interaction with Static/Credit (e.g. WREADY delay only when credit-starved) <text:span text:style-name="T1">MUST</text:span> be documented in the register map; <text:span text:style-name="T1">MUST</text:span> comply with AXI <text:span text:style-name="T1">W channel</text:span> rules.</text:p>
        </text:list-item>
      </text:list>
      <text:p text:style-name="First_20_paragraph"><text:span text:style-name="T1">MAY</text:span></text:p>
      <text:list text:style-name="L39">
        <text:list-item>
          <text:p text:style-name="P39">Priority and combining rules between AW delay and W delay.</text:p>
        </text:list-item>
      </text:list>
      <text:p text:style-name="Horizontal_20_Line"/>
      <text:h text:style-name="Heading_20_3" text:outline-level="3"><text:bookmark-start text:name="mode-select-and-registers-must"/>6.5 Mode Select and Registers (MUST)<text:bookmark-end text:name="mode-select-and-registers-must"/></text:h>
      <text:p text:style-name="First_20_paragraph"><text:span text:style-name="T1">MUST</text:span></text:p>
      <text:list text:style-name="L40">
        <text:list-item>
          <text:p text:style-name="P40">Select <text:span text:style-name="T1">one</text:span> of §6.2.1 or §6.2.2 at run time.<text:line-break/></text:p>
        </text:list-item>
        <text:list-item>
          <text:p text:style-name="P40">Unused fields <text:span text:style-name="T1">MAY</text:span> be ignored when inactive (<text:span text:style-name="T1">SHOULD</text:span> document).</text:p>
        </text:list-item>
      </text:list>
      <text:p text:style-name="Horizontal_20_Line"/>
      <text:h text:style-name="Heading_20_2" text:outline-level="2"><text:bookmark-start text:name="address-protection"/>7. Address Protection<text:bookmark-end text:name="address-protection"/></text:h>
      <text:p text:style-name="First_20_paragraph"><text:span text:style-name="T1">MAY</text:span> be enabled <text:span text:style-name="T1">independently</text:span> of bandwidth throttle and latency log.</text:p>
      <text:h text:style-name="Heading_20_3" text:outline-level="3"><text:bookmark-start text:name="protected-regions"/>7.1 Protected Regions<text:bookmark-end text:name="protected-regions"/></text:h>
      <text:p text:style-name="First_20_paragraph"><text:span text:style-name="T1">MUST</text:span></text:p>
      <text:list text:style-name="L41">
        <text:list-item>
          <text:p text:style-name="P41">Define allowed regions as <text:span text:style-name="T1">(base address, end address)</text:span> pairs; maximum number of pairs is a <text:span text:style-name="T1">design parameter</text:span>.<text:line-break/></text:p>
        </text:list-item>
        <text:list-item>
          <text:p text:style-name="P41">Each pair <text:span text:style-name="T1">MAY</text:span> be dynamically <text:span text:style-name="T1">valid</text:span>-gated.<text:line-break/></text:p>
        </text:list-item>
        <text:list-item>
          <text:p text:style-name="P41">If a transaction address falls in <text:span text:style-name="T1">no</text:span> active pair, treat as <text:span text:style-name="T1">protection violation</text:span> (compare ARADDR/AWADDR; details <text:span text:style-name="T1">MAY</text:span>).</text:p>
        </text:list-item>
      </text:list>
      <text:h text:style-name="Heading_20_3" text:outline-level="3"><text:bookmark-start text:name="graceful-ignore-behavior"/>7.2 Graceful Ignore Behavior<text:bookmark-end text:name="graceful-ignore-behavior"/></text:h>
      <text:p text:style-name="First_20_paragraph"><text:span text:style-name="T1">MUST — Read</text:span></text:p>
      <text:list text:style-name="L42">
        <text:list-item>
          <text:p text:style-name="P42">Log <text:span text:style-name="T1">AXID</text:span> and <text:span text:style-name="T1">ARADDR</text:span> to <text:span text:style-name="T1">error log registers</text:span>.<text:line-break/></text:p>
        </text:list-item>
        <text:list-item>
          <text:p text:style-name="P42">Complete handshakes <text:span text:style-name="T1">without breaking AXI timing</text:span> upstream or downstream.<text:line-break/></text:p>
        </text:list-item>
        <text:list-item>
          <text:p text:style-name="P42">How illegal accesses are blocked from the downstream slave (e.g. no AR downstream + local error response) is <text:span text:style-name="T1">MAY</text:span>; <text:span text:style-name="T1">no deadlock</text:span> and <text:span text:style-name="T1">VALID/READY compliance</text:span> are <text:span text:style-name="T1">MUST</text:span>.</text:p>
        </text:list-item>
      </text:list>
      <text:p text:style-name="First_20_paragraph"><text:span text:style-name="T1">MUST — Write</text:span></text:p>
      <text:list text:style-name="L43">
        <text:list-item>
          <text:p text:style-name="P43">Log sufficient fields (<text:span text:style-name="T1">AWADDR</text:span>, <text:span text:style-name="T1">AWID</text:span> recommended).<text:line-break/></text:p>
        </text:list-item>
        <text:list-item>
          <text:p text:style-name="P43">On the downstream write path, drive <text:span text:style-name="T1">WSTRB = 0</text:span> for all bytes (<text:span text:style-name="T1">MAY</text:span> align/pack cycles; <text:span text:style-name="T1">MUST</text:span> keep protocol legal).</text:p>
        </text:list-item>
      </text:list>
      <text:h text:style-name="Heading_20_3" text:outline-level="3"><text:bookmark-start text:name="error-log-register-format-must"/>7.3 Error Log Register Format (MUST)<text:bookmark-end text:name="error-log-register-format-must"/></text:h>
      <text:p text:style-name="First_20_paragraph">Each error source (or shared register) <text:span text:style-name="T1">MUST</text:span> include:</text:p>
      <text:list text:style-name="L44">
        <text:list-item>
          <text:p text:style-name="P44"><text:span text:style-name="T1">valid</text:span>: Error pending.<text:line-break/></text:p>
        </text:list-item>
        <text:list-item>
          <text:p text:style-name="P44"><text:span text:style-name="T1">multi</text:span>: Encodes:</text:p>
          <text:list text:style-name="L45">
            <text:list-item>
              <text:p text:style-name="P45"><text:span text:style-name="Source_Text">valid=1</text:span>, <text:span text:style-name="Source_Text">multi=0</text:span>: <text:span text:style-name="T1">one</text:span> occurrence.<text:line-break/></text:p>
            </text:list-item>
            <text:list-item>
              <text:p text:style-name="P45"><text:span text:style-name="Source_Text">valid=1</text:span>, <text:span text:style-name="Source_Text">multi=N</text:span> (N&gt;0): <text:span text:style-name="T1">N</text:span> occurrences (saturate at <text:span text:style-name="T1">multi</text:span> width; <text:span text:style-name="T1">MAY</text:span> add overflow flag — document).</text:p>
            </text:list-item>
          </text:list>
        </text:list-item>
      </text:list>
      <text:p text:style-name="First_20_paragraph"><text:span text:style-name="T1">MUST</text:span></text:p>
      <text:list text:style-name="L46">
        <text:list-item>
          <text:p text:style-name="P46">Clear error logs via <text:span text:style-name="T1">write-one-to-clear (W1C)</text:span> through the IP’s <text:span text:style-name="T1">APB CSR slave</text:span>.</text:p>
        </text:list-item>
      </text:list>
      <text:p text:style-name="First_20_paragraph"><text:span text:style-name="T1">MAY</text:span></text:p>
      <text:list text:style-name="L47">
        <text:list-item>
          <text:p text:style-name="P47">Separate vs merged registers for Read/Write errors.</text:p>
        </text:list-item>
      </text:list>
      <text:p text:style-name="Horizontal_20_Line"/>
      <text:h text:style-name="Heading_20_2" text:outline-level="2"><text:bookmark-start text:name="interrupt-and-status-summary"/>8. Interrupt and Status (summary)<text:bookmark-end text:name="interrupt-and-status-summary"/></text:h>
      <text:list text:style-name="L48">
        <text:list-item>
          <text:p text:style-name="P48"><text:span text:style-name="T1">One</text:span> interrupt line.<text:line-break/></text:p>
        </text:list-item>
        <text:list-item>
          <text:p text:style-name="P48"><text:span text:style-name="T1">MAY</text:span> mask logging FIFO events, address-protection errors, etc., provided software can still distinguish events.</text:p>
        </text:list-item>
      </text:list>
      <text:p text:style-name="Horizontal_20_Line"/>
      <text:h text:style-name="Heading_20_2" text:outline-level="2"><text:bookmark-start text:name="verification-must"/>9. Verification (MUST)<text:bookmark-end text:name="verification-must"/></text:h>
      <text:list text:style-name="L49">
        <text:list-item>
          <text:p text:style-name="P49">Sufficient <text:span text:style-name="T1">assertions (SVA, etc.)</text:span> for AXI protocol and counter boundary conditions in this document.</text:p>
        </text:list-item>
      </text:list>
      <text:p text:style-name="Horizontal_20_Line"/>
      <text:h text:style-name="Heading_20_2" text:outline-level="2"><text:bookmark-start text:name="structural-overview"/>10. Structural Overview<text:bookmark-end text:name="structural-overview"/></text:h>
      <text:h text:style-name="Heading_20_3" text:outline-level="3"><text:bookmark-start text:name="block-diagram"/>10.1 Block Diagram<text:bookmark-end text:name="block-diagram"/></text:h>
      <text:p text:style-name="FigureWithCaption"><draw:frame draw:name="img1" svg:width="1536.0pt" svg:height="1024.0pt"><draw:image xlink:href="Pictures/0.png" xlink:type="simple" xlink:show="embed" xlink:actuate="onLoad"/></draw:frame></text:p>
      <text:p text:style-name="FigureCaption">AXI Performance Monitor conceptual blocks</text:p>
      <text:h text:style-name="Heading_20_3" text:outline-level="3"><text:bookmark-start text:name="filters-features-reference-mermaid"/>10.2 Filters → Features (reference Mermaid)<text:bookmark-end text:name="filters-features-reference-mermaid"/></text:h>
      <text:p text:style-name="P50">flowchart LR</text:p>
      <text:p text:style-name="P51"><text:s text:c="2"/>subgraph filt [Filter stage]</text:p>
      <text:p text:style-name="P52"><text:s text:c="4"/>A[Address]</text:p>
      <text:p text:style-name="P53"><text:s text:c="4"/>I[ID mode]</text:p>
      <text:p text:style-name="P54"><text:s text:c="4"/>D[Direction]</text:p>
      <text:p text:style-name="P55"><text:s text:c="2"/>end</text:p>
      <text:p text:style-name="P56"><text:s text:c="2"/>filt --&gt; BW[Bandwidth log]</text:p>
      <text:p text:style-name="P57"><text:s text:c="2"/>filt --&gt; LAT[Latency incl multi-tx]</text:p>
      <text:p text:style-name="P58"><text:s text:c="2"/>filt --&gt; TH[Throttle static or credit]</text:p>
      <text:p text:style-name="P59"><text:s text:c="2"/>XTH[External request_throttle] --&gt; TH</text:p>
      <text:p text:style-name="P60"><text:s text:c="2"/>filt --&gt; AP[Address protection]</text:p>
      <text:p text:style-name="Horizontal_20_Line"/>
      <text:h text:style-name="Heading_20_2" text:outline-level="2"><text:bookmark-start text:name="implementation-deliverables-should"/>11. Implementation Deliverables (SHOULD)<text:bookmark-end text:name="implementation-deliverables-should"/></text:h>
      <text:p text:style-name="First_20_paragraph">The IP provider <text:span text:style-name="T1">SHOULD</text:span> supply, together with the implementation (directory layout <text:span text:style-name="T1">MAY</text:span> vary):</text:p>
      <text:list text:style-name="L50">
        <text:list-item>
          <text:p text:style-name="P61"><text:span text:style-name="T1">RTL sources</text:span>: Verilog/SystemVerilog suitable for synthesis and simulation.<text:line-break/></text:p>
        </text:list-item>
        <text:list-item>
          <text:p text:style-name="P61"><text:span text:style-name="T1">User documentation</text:span>: <text:span text:style-name="T1">Control register descriptions</text:span> (bit meanings, addresses, reset values) consistent with this specification, plus clock/reset and parameter descriptions.<text:line-break/></text:p>
        </text:list-item>
        <text:list-item>
          <text:p text:style-name="P61"><text:span text:style-name="T1">Verification collateral</text:span>: SVA assertions, test plan or verification summary.</text:p>
        </text:list-item>
      </text:list>
      <text:p text:style-name="Horizontal_20_Line"/>
      <text:h text:style-name="Heading_20_2" text:outline-level="2"><text:bookmark-start text:name="appendix-a.-terms-abbreviations-and-axi-channels"/>Appendix A. Terms, Abbreviations, and AXI Channels<text:bookmark-end text:name="appendix-a.-terms-abbreviations-and-axi-channels"/></text:h>
      <text:p text:style-name="First_20_paragraph">This appendix <text:span text:style-name="T1">summarizes</text:span> concepts for readability; protocol details follow <text:span text:style-name="T1">AMBA AXI</text:span>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Term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Upstream / Downstream</text:span></text:p>
          </table:table-cell>
          <table:table-cell table:style-name="TableRowCell" office:value-type="string">
            <text:p text:style-name="Table_20_Contents">Relative to traffic flow through the monitor; connects to upstream masters/slaves on one side and downstream on the other (matches “Master Up / Master Down” naming in §2).</text:p>
          </table:table-cell>
        </table:table-row>
        <table:table-row>
          <table:table-cell table:style-name="TableRowCell" office:value-type="string">
            <text:p text:style-name="Table_20_Contents"><text:span text:style-name="T1">AR / AW / R / W / B</text:span></text:p>
          </table:table-cell>
          <table:table-cell table:style-name="TableRowCell" office:value-type="string">
            <text:p text:style-name="Table_20_Contents">Read address, Write address, Read data, Write data, Write response channels.</text:p>
          </table:table-cell>
        </table:table-row>
        <table:table-row>
          <table:table-cell table:style-name="TableRowCell" office:value-type="string">
            <text:p text:style-name="Table_20_Contents"><text:span text:style-name="T1">Outstanding</text:span></text:p>
          </table:table-cell>
          <table:table-cell table:style-name="TableRowCell" office:value-type="string">
            <text:p text:style-name="Table_20_Contents">A transaction whose response is not yet complete while subsequent address/data phases may be in flight; used in §5.2.2 multi-transaction segments.</text:p>
          </table:table-cell>
        </table:table-row>
        <table:table-row>
          <table:table-cell table:style-name="TableRowCell" office:value-type="string">
            <text:p text:style-name="Table_20_Contents"><text:span text:style-name="T1">APB</text:span></text:p>
          </table:table-cell>
          <table:table-cell table:style-name="TableRowCell" office:value-type="string">
            <text:p text:style-name="Table_20_Contents">Low-speed configuration bus; this IP assumes a <text:span text:style-name="T1">32-bit APB slave</text:span> for CSR access.</text:p>
          </table:table-cell>
        </table:table-row>
        <table:table-row>
          <table:table-cell table:style-name="TableRowCell" office:value-type="string">
            <text:p text:style-name="Table_20_Contents"><text:span text:style-name="T1">CSR</text:span></text:p>
          </table:table-cell>
          <table:table-cell table:style-name="TableRowCell" office:value-type="string">
            <text:p text:style-name="Table_20_Contents">Control/status registers for configuration, statistics, and error logs.</text:p>
          </table:table-cell>
        </table:table-row>
        <table:table-row>
          <table:table-cell table:style-name="TableRowCell" office:value-type="string">
            <text:p text:style-name="Table_20_Contents"><text:span text:style-name="T1">Even/Odd FIFO</text:span></text:p>
          </table:table-cell>
          <table:table-cell table:style-name="TableRowCell" office:value-type="string">
            <text:p text:style-name="Table_20_Contents">Two storage banks alternated every N periods so software can read one bank while the other continues recording.</text:p>
          </table:table-cell>
        </table:table-row>
        <table:table-row>
          <table:table-cell table:style-name="TableRowCell" office:value-type="string">
            <text:p text:style-name="Table_20_Contents"><text:span text:style-name="T1">W1C</text:span></text:p>
          </table:table-cell>
          <table:table-cell table:style-name="TableRowCell" office:value-type="string">
            <text:p text:style-name="Table_20_Contents">Write 1 to Clear; writing 1 to a bit clears a flag.</text:p>
          </table:table-cell>
        </table:table-row>
        <table:table-row>
          <table:table-cell table:style-name="TableRowCell" office:value-type="string">
            <text:p text:style-name="Table_20_Contents"><text:span text:style-name="T1">SVA</text:span></text:p>
          </table:table-cell>
          <table:table-cell table:style-name="TableRowCell" office:value-type="string">
            <text:p text:style-name="Table_20_Contents">SystemVerilog Assertions.</text:p>
          </table:table-cell>
        </table:table-row>
      </table:table>
      <text:p text:style-name="First_20_paragraph"><text:span text:style-name="T1">Byte counting</text:span>: Phrases such as “AxSIZE × burst length” refer to <text:span text:style-name="T1">transaction byte volume</text:span> derived from AXI <text:span text:style-name="T1">AWSIZE/ARSIZE</text:span> and <text:span text:style-name="T1">AWLEN/ARLEN</text:span> (and related rules); the exact formula SHOULD match the AXI standard and be stated in the register/user documentation.</text:p>
      <text:p text:style-name="Horizontal_20_Line"/>
      <text:p text:style-name="First_20_paragraph"><text:span text:style-name="T1">Companion documentation</text:span>: Register maps, pin lists, and timing are provided separately by the IP provider and MUST satisfy the functional requirements of this specificatio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6-04-29T22:19:07Z</meta:creation-date>
    <dc:date>2026-04-29T22:19:07Z</dc:date>
  </office:meta>
</office:document-meta>
</file>