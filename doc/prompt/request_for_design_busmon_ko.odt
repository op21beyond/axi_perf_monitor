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2767*"/>
    </style:style>
    <style:style style:name="Table1.B" style:family="table-column">
      <style:table-column-properties style:rel-column-width="32767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2767*"/>
    </style:style>
    <style:style style:name="Table2.B" style:family="table-column">
      <style:table-column-properties style:rel-column-width="32767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23130*"/>
    </style:style>
    <style:style style:name="Table3.B" style:family="table-column">
      <style:table-column-properties style:rel-column-width="42405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32767*"/>
    </style:style>
    <style:style style:name="Table4.B" style:family="table-column">
      <style:table-column-properties style:rel-column-width="32767*"/>
    </style:style>
  </office:automatic-styles>
  <office:body>
    <office:text>
      <text:h text:style-name="Heading_20_1" text:outline-level="1"><text:bookmark-start text:name="axi-performance-monitor-ip-soc-설계-의뢰서-design-request-specification"/>AXI Performance Monitor IP — SoC 설계 의뢰서 (Design Request Specification)<text:bookmark-end text:name="axi-performance-monitor-ip-soc-설계-의뢰서-design-request-specification"/></text:h>
      <text:p text:style-name="First_20_paragraph"><text:span text:style-name="T1">문서 목적</text:span>: 본 문서는 SoC IP 개발팀이 Verilog/SystemVerilog 기반 <text:span text:style-name="T1">AXI 성능 모니터 겸 대역폭 제어·주소 보호 IP</text:span>를 구현하기 위해 필요한 기능·동작·제약을 <text:span text:style-name="T1">최초 전달</text:span> 기준으로 정의한다.<text:line-break/><text:span text:style-name="T1">독자</text:span>: SoC·IP 설계/검증/소프트웨어 담당자(본 IP를 처음 수령하는 경우를 가정).</text:p>
      <text:p text:style-name="Text_20_body"><text:span text:style-name="T1">범위</text:span>: 본 문서가 이 IP에 대한 <text:span text:style-name="T1">기능·동작 요구의 단일 규범(norms) 기준</text:span>이다. <text:span text:style-name="T1">레지스터 비트·주소, 핀/포트 목록, 타이밍·전기 제약, SoC 연계 절차</text:span>는 IP 공급자가 <text:span text:style-name="T1">동반 제공하는 자료</text:span>에서 확정하되, 본 문서와 <text:span text:style-name="T1">모순 없이</text:span> 작성한다.</text:p>
      <text:p text:style-name="Text_20_body"><text:span text:style-name="T1">단독 전달</text:span>: 본 패키지(한글·영문 의뢰서 마크다운, 블록 개요 그림)만으로 요구사항을 전달할 수 있게 작성하였으며, <text:span text:style-name="T1">다른 저장소의 마크다운이나 내부 문서를 읽을 필요는 없다.</text:span></text:p>
      <text:h text:style-name="Heading_20_3" text:outline-level="3"><text:bookmark-start text:name="권장-전달-파일-구성"/>권장 전달 파일 구성<text:bookmark-end text:name="권장-전달-파일-구성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파일</text:p>
            </table:table-cell>
            <table:table-cell table:style-name="TableHeaderRowCell" office:value-type="string">
              <text:p text:style-name="Table_20_Heading">설명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request_for_design_busmon.md</text:span></text:p>
          </table:table-cell>
          <table:table-cell table:style-name="TableRowCell" office:value-type="string">
            <text:p text:style-name="Table_20_Contents">한글 본 사양(규범 텍스트·표).</text:p>
          </table:table-cell>
        </table:table-row>
        <table:table-row>
          <table:table-cell table:style-name="TableRowCell" office:value-type="string">
            <text:p text:style-name="Table_20_Contents"><text:span text:style-name="Source_Text">request_for_design_busmon_en.md</text:span></text:p>
          </table:table-cell>
          <table:table-cell table:style-name="TableRowCell" office:value-type="string">
            <text:p text:style-name="Table_20_Contents">동일 내용 영문 사양.</text:p>
          </table:table-cell>
        </table:table-row>
        <table:table-row>
          <table:table-cell table:style-name="TableRowCell" office:value-type="string">
            <text:p text:style-name="Table_20_Contents"><text:span text:style-name="Source_Text">busmon_architecture_overview.png</text:span></text:p>
          </table:table-cell>
          <table:table-cell table:style-name="TableRowCell" office:value-type="string">
            <text:p text:style-name="Table_20_Contents">§10 블록 개요; 마크다운과 <text:span text:style-name="T1">동일 폴더</text:span>에 둘 것(상대 경로로 삽입).</text:p>
          </table:table-cell>
        </table:table-row>
      </table:table>
      <text:p text:style-name="First_20_paragraph">마크다운에서 Word 등으로 변환할 수 있다. §10.2의 Mermaid 도식은 뷰어에 따라 표시되지 않을 수 있으므로, <text:span text:style-name="T1">상세 동작·수치는 §4~§9 본문과 표</text:span>를 따른다.</text:p>
      <text:p text:style-name="Horizontal_20_Line"/>
      <text:h text:style-name="Heading_20_2" text:outline-level="2"><text:bookmark-start text:name="필수-vs-설계자-재량-표기"/>0. 필수 vs 설계자 재량 표기<text:bookmark-end text:name="필수-vs-설계자-재량-표기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표기</text:p>
            </table:table-cell>
            <table:table-cell table:style-name="TableHeaderRowCell" office:value-type="string">
              <text:p text:style-name="Table_20_Heading">의미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필수(MUST)</text:span></text:p>
          </table:table-cell>
          <table:table-cell table:style-name="TableRowCell" office:value-type="string">
            <text:p text:style-name="Table_20_Contents">본 문서에 명시된 대로 구현·검증해야 함.</text:p>
          </table:table-cell>
        </table:table-row>
        <table:table-row>
          <table:table-cell table:style-name="TableRowCell" office:value-type="string">
            <text:p text:style-name="Table_20_Contents"><text:span text:style-name="T1">권장(SHOULD)</text:span></text:p>
          </table:table-cell>
          <table:table-cell table:style-name="TableRowCell" office:value-type="string">
            <text:p text:style-name="Table_20_Contents">일반적으로 그렇게 하는 것이 바람직하나, 동등 이상의 품질이면 대체 가능.</text:p>
          </table:table-cell>
        </table:table-row>
        <table:table-row>
          <table:table-cell table:style-name="TableRowCell" office:value-type="string">
            <text:p text:style-name="Table_20_Contents"><text:span text:style-name="T1">재량(MAY)</text:span></text:p>
          </table:table-cell>
          <table:table-cell table:style-name="TableRowCell" office:value-type="string">
            <text:p text:style-name="Table_20_Contents">구현 방식·마이크로아키텍처·세부 파라미터는 설계자 판단. 단, <text:span text:style-name="T1">필수 동작·AXI 규약 준수</text:span>는 깨지면 안 됨.</text:p>
          </table:table-cell>
        </table:table-row>
      </table:table>
      <text:p text:style-name="Horizontal_20_Line"/>
      <text:h text:style-name="Heading_20_2" text:outline-level="2"><text:bookmark-start text:name="설계-목표-필수"/>1. 설계 목표 (필수)<text:bookmark-end text:name="설계-목표-필수"/></text:h>
      <text:list text:style-name="L1">
        <text:list-item>
          <text:p text:style-name="P1">상용 양산 가능한 수준의 완성도로 <text:span text:style-name="T1">AXI 성능 모니터 IP</text:span>를 제공한다.</text:p>
        </text:list-item>
        <text:list-item>
          <text:p text:style-name="P1"><text:span text:style-name="T1">대역폭/지연 로깅</text:span>, <text:span text:style-name="T1">대역폭 스로틀(여러 threshold 모드)</text:span>, <text:span text:style-name="T1">외부 스로틀 제어(External throttle control)</text:span>, <text:span text:style-name="T1">주소 보호(Address Protection)</text:span> 를 하나의 IP에서 제어·상태 레지스터로 구성할 수 있어야 한다.</text:p>
        </text:list-item>
        <text:list-item>
          <text:p text:style-name="P1">고주파 동작을 고려한 파이프라인·타이밍 여유를 갖출 것.</text:p>
        </text:list-item>
      </text:list>
      <text:p text:style-name="Horizontal_20_Line"/>
      <text:h text:style-name="Heading_20_2" text:outline-level="2"><text:bookmark-start text:name="인터페이스-필수"/>2. 인터페이스 (필수)<text:bookmark-end text:name="인터페이스-필수"/></text:h>
      <text:h text:style-name="Heading_20_3" text:outline-level="3"><text:bookmark-start text:name="axi"/>2.1 AXI<text:bookmark-end text:name="axi"/></text:h>
      <text:list text:style-name="L2">
        <text:list-item>
          <text:p text:style-name="P2"><text:span text:style-name="T1">AXI Master Up / Master Down(또는 Slave Up / Master Down 등 명명은 재량)</text:span></text:p>
          <text:list text:style-name="L3">
            <text:list-item>
              <text:p text:style-name="P3">Upstream과 Downstream은 <text:span text:style-name="T1">동일 데이터 폭</text:span>, <text:span text:style-name="T1">동일 클럭</text:span>을 사용한다.<text:line-break/></text:p>
            </text:list-item>
          </text:list>
        </text:list-item>
        <text:list-item>
          <text:p text:style-name="P2">기본 데이터 폭은 <text:span text:style-name="T1">256 bit</text:span>(설계 파라미터로 변경 가능은 <text:span text:style-name="T1">재량</text:span>, 기본값은 256).<text:line-break/></text:p>
        </text:list-item>
        <text:list-item>
          <text:p text:style-name="P2"><text:span text:style-name="T1">Optional Register Slice</text:span>는 Up/Down 양측 또는 한쪽에 삽입 가능하도록 <text:span text:style-name="T1">파라미터</text:span>로 선택 가능해야 한다.</text:p>
        </text:list-item>
      </text:list>
      <text:h text:style-name="Heading_20_3" text:outline-level="3"><text:bookmark-start text:name="제어상태-apb"/>2.2 제어·상태 — APB<text:bookmark-end text:name="제어상태-apb"/></text:h>
      <text:list text:style-name="L4">
        <text:list-item>
          <text:p text:style-name="P4">Control/Status는 <text:span text:style-name="T1">APB 32 bit</text:span> 슬레이브 인터페이스로 접근한다.<text:line-break/></text:p>
        </text:list-item>
        <text:list-item>
          <text:p text:style-name="P4"><text:span text:style-name="Source_Text">pstrb</text:span>는 <text:span text:style-name="T1">0xF 고정</text:span> 가정 가능.<text:line-break/></text:p>
        </text:list-item>
        <text:list-item>
          <text:p text:style-name="P4">Master AXI와 <text:span text:style-name="T1">동일 클럭</text:span> 도메인.</text:p>
        </text:list-item>
      </text:list>
      <text:h text:style-name="Heading_20_3" text:outline-level="3"><text:bookmark-start text:name="인터럽트"/>2.3 인터럽트<text:bookmark-end text:name="인터럽트"/></text:h>
      <text:list text:style-name="L5">
        <text:list-item>
          <text:p text:style-name="P5"><text:span text:style-name="T1">인터럽트 출력 1개</text:span>(로깅 등 이벤트 공통 또는 마스킹 후 단일 라인 — 소스·마스크 비트 배치는 §8 및 <text:span text:style-name="T1">동반 제공되는 제어 레지스터 정의</text:span>에서 규정).</text:p>
        </text:list-item>
      </text:list>
      <text:h text:style-name="Heading_20_3" text:outline-level="3"><text:bookmark-start text:name="버스-외부-입력-external-throttle-control"/>2.4 버스 외부 입력 — External throttle control<text:bookmark-end text:name="버스-외부-입력-external-throttle-control"/></text:h>
      <text:p text:style-name="First_20_paragraph"><text:span text:style-name="T1">필수</text:span></text:p>
      <text:list text:style-name="L6">
        <text:list-item>
          <text:p text:style-name="P6">AXI 버스 포트와 <text:span text:style-name="T1">별도</text:span>인 <text:span text:style-name="T1">2 bit</text:span> 입력 포트 <text:span text:style-name="Source_Text">request_throttle[1:0]</text:span> 를 둔다.<text:line-break/></text:p>
        </text:list-item>
        <text:list-item>
          <text:p text:style-name="P6">입력 값은 <text:span text:style-name="T1">0~3</text:span>만 유효한 조합으로 정의한다(불필요한 비트 조합은 <text:span text:style-name="T1">재량</text:span>으로 무시하거나 0과 동일 처리 — 레지스터/문서에 명시).<text:line-break/></text:p>
        </text:list-item>
        <text:list-item>
          <text:p text:style-name="P6">이 신호는 <text:span text:style-name="T1">AXI와 동일 클럭</text:span> 도메인으로 동작하는 것을 <text:span text:style-name="T1">권장</text:span>한다. 비동기 도메인이면 <text:span text:style-name="T1">재량</text:span>으로 동기화 단계를 두되, 메타스테이블리티 방지를 <text:span text:style-name="T1">필수</text:span>로 고려한다.</text:p>
        </text:list-item>
      </text:list>
      <text:p text:style-name="First_20_paragraph"><text:span text:style-name="T1">재량</text:span></text:p>
      <text:list text:style-name="L7">
        <text:list-item>
          <text:p text:style-name="P7">포트 방향 표기(<text:span text:style-name="Source_Text">input</text:span> 등) 및 모듈 최상단 핀 이름 접두어.</text:p>
        </text:list-item>
      </text:list>
      <text:p text:style-name="Horizontal_20_Line"/>
      <text:h text:style-name="Heading_20_2" text:outline-level="2"><text:bookmark-start text:name="기능별-enable-disable-필수"/>3. 기능별 Enable / Disable (필수)<text:bookmark-end text:name="기능별-enable-disable-필수"/></text:h>
      <text:p text:style-name="First_20_paragraph">Control 레지스터에 <text:span text:style-name="T1">기능 단위 enable/disable</text:span> 필드가 있어야 한다. 최소 분리 예시(이름·비트 배치는 <text:span text:style-name="T1">재량</text:span>):</text:p>
      <text:list text:style-name="L8">
        <text:list-item>
          <text:p text:style-name="P8">Bandwidth logging<text:line-break/></text:p>
        </text:list-item>
        <text:list-item>
          <text:p text:style-name="P8">Latency logging (단일 트랜잭션 / 멀티 트랜잭션 지연은 하위 enable 또는 공통 period 내 통계 선택 — §5.2)<text:line-break/></text:p>
        </text:list-item>
        <text:list-item>
          <text:p text:style-name="P8">Bandwidth throttling<text:line-break/></text:p>
        </text:list-item>
        <text:list-item>
          <text:p text:style-name="P8"><text:span text:style-name="T1">External throttle control</text:span> (<text:span text:style-name="Source_Text">request_throttle</text:span> 입력 경로 — §6.3)<text:line-break/></text:p>
        </text:list-item>
        <text:list-item>
          <text:p text:style-name="P8">Address protection</text:p>
        </text:list-item>
      </text:list>
      <text:p text:style-name="First_20_paragraph">각 기능이 꺼졌을 때 <text:span text:style-name="T1">불필요한 클록 토글 감소</text:span> 등은 <text:span text:style-name="T1">권장</text:span>.</text:p>
      <text:p text:style-name="Horizontal_20_Line"/>
      <text:h text:style-name="Heading_20_2" text:outline-level="2"><text:bookmark-start text:name="트랜잭션-필터-필수"/>4. 트랜잭션 필터 (필수)<text:bookmark-end text:name="트랜잭션-필터-필수"/></text:h>
      <text:p text:style-name="First_20_paragraph">로깅·지연 측정·스로틀 <text:span text:style-name="T1">적용 범위</text:span> 판단에 공통으로 사용한다. 필터는 <text:span text:style-name="T1">논리 AND</text:span>로 조합한다: 주소·ID·방향 조건을 <text:span text:style-name="T1">모두</text:span> 만족하는 트랜잭션에만 해당 기능이 적용된다(각 기능 enable이 켜진 경우).</text:p>
      <text:h text:style-name="Heading_20_3" text:outline-level="3"><text:bookmark-start text:name="주소-필터"/>4.1 주소 필터<text:bookmark-end text:name="주소-필터"/></text:h>
      <text:p text:style-name="First_20_paragraph"><text:span text:style-name="T1">필수</text:span></text:p>
      <text:list text:style-name="L9">
        <text:list-item>
          <text:p text:style-name="P9">Control 레지스터로 <text:span text:style-name="T1">시작 주소 + 크기</text:span>(또는 시작/끝) 범위 내 트랜잭션만 추적하거나, <text:span text:style-name="T1">전체 주소 공간 추적</text:span>을 선택할 수 있어야 한다.</text:p>
        </text:list-item>
      </text:list>
      <text:p text:style-name="First_20_paragraph"><text:span text:style-name="T1">재량</text:span></text:p>
      <text:list text:style-name="L10">
        <text:list-item>
          <text:p text:style-name="P10">주소 비교 방식( 정렬 제약, 상위 비트 마스크 등 )은 구현에 맞게 정의.</text:p>
        </text:list-item>
      </text:list>
      <text:h text:style-name="Heading_20_3" text:outline-level="3"><text:bookmark-start text:name="id-필터"/>4.2 ID 필터<text:bookmark-end text:name="id-필터"/></text:h>
      <text:p text:style-name="First_20_paragraph"><text:span text:style-name="T1">필수</text:span></text:p>
      <text:list text:style-name="L11">
        <text:list-item>
          <text:p text:style-name="P11"><text:span text:style-name="T1">AXI ID</text:span>(ARID/AWID 폭은 AXI 파라미터에 따름)에 대해 다음 모드를 레지스터로 선택 가능해야 한다.</text:p>
          <text:list text:style-name="L12">
            <text:list-item>
              <text:p text:style-name="P12"><text:span text:style-name="T1">특정 ID만 추적(화이트리스트)</text:span> — 하나 이상의 ID 값 매칭(매칭 항목 수·비트 폭은 <text:span text:style-name="T1">디자인 파라미터</text:span>로 상한 정의).<text:line-break/></text:p>
            </text:list-item>
            <text:list-item>
              <text:p text:style-name="P12"><text:span text:style-name="T1">특정 ID 제외(블랙리스트)</text:span> — 지정 ID는 제외.<text:line-break/></text:p>
            </text:list-item>
            <text:list-item>
              <text:p text:style-name="P12"><text:span text:style-name="T1">전체 ID 추적</text:span>(필터 비활성과 동일 의미로 동작).</text:p>
            </text:list-item>
          </text:list>
        </text:list-item>
      </text:list>
      <text:p text:style-name="First_20_paragraph"><text:span text:style-name="T1">재량</text:span></text:p>
      <text:list text:style-name="L13">
        <text:list-item>
          <text:p text:style-name="P13">화이트/블랙리스트 항목 수, 마스크·범위 비교 vs 완전 일치 목록.</text:p>
        </text:list-item>
      </text:list>
      <text:h text:style-name="Heading_20_3" text:outline-level="3"><text:bookmark-start text:name="direction-필터"/>4.3 DIRECTION 필터<text:bookmark-end text:name="direction-필터"/></text:h>
      <text:p text:style-name="First_20_paragraph"><text:span text:style-name="T1">필수</text:span></text:p>
      <text:list text:style-name="L14">
        <text:list-item>
          <text:p text:style-name="P14">다음 중 레지스터로 선택:</text:p>
          <text:list text:style-name="L15">
            <text:list-item>
              <text:p text:style-name="P15"><text:span text:style-name="T1">Read만</text:span><text:line-break/></text:p>
            </text:list-item>
            <text:list-item>
              <text:p text:style-name="P15"><text:span text:style-name="T1">Write만</text:span><text:line-break/></text:p>
            </text:list-item>
            <text:list-item>
              <text:p text:style-name="P15"><text:span text:style-name="T1">Read + Write 모두</text:span></text:p>
            </text:list-item>
          </text:list>
        </text:list-item>
      </text:list>
      <text:p text:style-name="First_20_paragraph"><text:span text:style-name="T1">재량</text:span></text:p>
      <text:list text:style-name="L16">
        <text:list-item>
          <text:p text:style-name="P16">“Write”에 AW만 포함할지 AW+W 채널 범위 구분 등 세부는 AXI 표준에 맞게 정의.</text:p>
        </text:list-item>
      </text:list>
      <text:h text:style-name="Heading_20_3" text:outline-level="3"><text:bookmark-start text:name="적용-범위-요약-필수"/>4.4 적용 범위 요약 (필수)<text:bookmark-end text:name="적용-범위-요약-필수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기능</text:p>
            </table:table-cell>
            <table:table-cell table:style-name="TableHeaderRowCell" office:value-type="string">
              <text:p text:style-name="Table_20_Heading">필터 조합</text:p>
            </table:table-cell>
          </table:table-row>
        </table:table-header-rows>
        <table:table-row>
          <table:table-cell table:style-name="TableRowCell" office:value-type="string">
            <text:p text:style-name="Table_20_Contents">Bandwidth logging</text:p>
          </table:table-cell>
          <table:table-cell table:style-name="TableRowCell" office:value-type="string">
            <text:p text:style-name="Table_20_Contents">주소 + ID + DIRECTION</text:p>
          </table:table-cell>
        </table:table-row>
        <table:table-row>
          <table:table-cell table:style-name="TableRowCell" office:value-type="string">
            <text:p text:style-name="Table_20_Contents">Latency logging (§5)</text:p>
          </table:table-cell>
          <table:table-cell table:style-name="TableRowCell" office:value-type="string">
            <text:p text:style-name="Table_20_Contents">동일</text:p>
          </table:table-cell>
        </table:table-row>
        <table:table-row>
          <table:table-cell table:style-name="TableRowCell" office:value-type="string">
            <text:p text:style-name="Table_20_Contents">Bandwidth throttling (§6)</text:p>
          </table:table-cell>
          <table:table-cell table:style-name="TableRowCell" office:value-type="string">
            <text:p text:style-name="Table_20_Contents">주소 + ID + DIRECTION (Latency logging과 동일 조합)</text:p>
          </table:table-cell>
        </table:table-row>
      </table:table>
      <text:p text:style-name="Horizontal_20_Line"/>
      <text:h text:style-name="Heading_20_2" text:outline-level="2"><text:bookmark-start text:name="performance-logging"/>5. Performance Logging<text:bookmark-end text:name="performance-logging"/></text:h>
      <text:h text:style-name="Heading_20_3" text:outline-level="3"><text:bookmark-start text:name="bandwidth-logging"/>5.1 Bandwidth Logging<text:bookmark-end text:name="bandwidth-logging"/></text:h>
      <text:p text:style-name="First_20_paragraph"><text:span text:style-name="T1">요약(필수)</text:span></text:p>
      <text:list text:style-name="L17">
        <text:list-item>
          <text:p text:style-name="P17"><text:span text:style-name="T1">Period</text:span>: 사이클 수 또는 트랜잭션 수(AW+AR 핸드셰이크 등 정의는 레지스터 설명서에 명시) 중 선택. Enable 시 반복.<text:line-break/></text:p>
        </text:list-item>
        <text:list-item>
          <text:p text:style-name="P17"><text:span text:style-name="T1">측정</text:span>: <text:span text:style-name="Source_Text">AxSIZE × burst length</text:span> 등으로 바이트 산출; Write/Read 각각 누적; Period 종료 시 FIFO 저장.<text:line-break/></text:p>
        </text:list-item>
        <text:list-item>
          <text:p text:style-name="P17"><text:span text:style-name="T1">FIFO</text:span>: Depth는 parameter; <text:span text:style-name="T1">Even/Odd</text:span> 두 뱅크; <text:span text:style-name="T1">N</text:span> period마다 저장 뱅크 전환(<text:span text:style-name="Source_Text">N</text:span>은 depth 미만, Control로 설정).<text:line-break/></text:p>
        </text:list-item>
        <text:list-item>
          <text:p text:style-name="P17"><text:span text:style-name="T1">인터럽트</text:span>: N period마다 레벨 인터럽트 가능, interrupt enable로 마스크.<text:line-break/></text:p>
        </text:list-item>
        <text:list-item>
          <text:p text:style-name="P17"><text:span text:style-name="T1">상태</text:span>: 현재 Even/Odd 쓰기 대상, 마지막 인터럽트가 어느 FIFO 저장 이후인지.<text:line-break/></text:p>
        </text:list-item>
        <text:list-item>
          <text:p text:style-name="P17"><text:span text:style-name="T1">필터</text:span>: §4 조합으로 카운트 대상 결정.</text:p>
        </text:list-item>
      </text:list>
      <text:p text:style-name="First_20_paragraph"><text:span text:style-name="T1">재량</text:span></text:p>
      <text:list text:style-name="L18">
        <text:list-item>
          <text:p text:style-name="P18">FIFO 구현(메모리 타입), 메타데이터 필드.</text:p>
        </text:list-item>
      </text:list>
      <text:p text:style-name="Horizontal_20_Line"/>
      <text:h text:style-name="Heading_20_3" text:outline-level="3"><text:bookmark-start text:name="latency-logging"/>5.2 Latency Logging<text:bookmark-end text:name="latency-logging"/></text:h>
      <text:h text:style-name="Heading_20_4" text:outline-level="4"><text:bookmark-start text:name="period-및-평균-저장"/>5.2.1 Period 및 평균 저장<text:bookmark-end text:name="period-및-평균-저장"/></text:h>
      <text:p text:style-name="First_20_paragraph"><text:span text:style-name="T1">필수</text:span></text:p>
      <text:list text:style-name="L19">
        <text:list-item>
          <text:p text:style-name="P19">Period는 Bandwidth logging과 <text:span text:style-name="T1">동일 레지스터</text:span> 사용.<text:line-break/></text:p>
        </text:list-item>
        <text:list-item>
          <text:p text:style-name="P19"><text:span text:style-name="T1">단일 트랜잭션</text:span> 관점의 지연은 Period마다 <text:span text:style-name="T1">평균</text:span>만 저장: 누적 합 / 트랜잭션 수.<text:line-break/></text:p>
        </text:list-item>
        <text:list-item>
          <text:p text:style-name="P19"><text:span text:style-name="T1">Write latency</text:span>: AW 핸드셰이크 완료 후 <text:span text:style-name="T1">B 채널 최초 수락</text:span>까지 사이클.<text:line-break/></text:p>
        </text:list-item>
        <text:list-item>
          <text:p text:style-name="P19"><text:span text:style-name="T1">Read latency</text:span>:</text:p>
          <text:list text:style-name="L20">
            <text:list-item>
              <text:p text:style-name="P20">AR 이후 <text:span text:style-name="T1">첫 RVALID</text:span>까지<text:line-break/></text:p>
            </text:list-item>
            <text:list-item>
              <text:p text:style-name="P20">AR 이후 <text:span text:style-name="T1">마지막 RLAST &amp; RVALID</text:span>까지 (두 값 각각 통계).<text:line-break/></text:p>
            </text:list-item>
          </text:list>
        </text:list-item>
        <text:list-item>
          <text:p text:style-name="P19">FIFO Even/Odd, N 주기 전환: Bandwidth와 동일 정책.</text:p>
        </text:list-item>
      </text:list>
      <text:p text:style-name="First_20_paragraph"><text:span text:style-name="T1">재량</text:span></text:p>
      <text:list text:style-name="L21">
        <text:list-item>
          <text:p text:style-name="P21">내부 구조(예: ID별 대기 큐)는 구현에 맞게 선택한다.</text:p>
        </text:list-item>
      </text:list>
      <text:h text:style-name="Heading_20_4" text:outline-level="4"><text:bookmark-start text:name="read-write-multi-transaction-latency"/>5.2.2 Read / Write Multi-Transaction Latency<text:bookmark-end text:name="read-write-multi-transaction-latency"/></text:h>
      <text:p text:style-name="First_20_paragraph"><text:span text:style-name="T1">목적</text:span>: Outstanding 트랜잭션이 겹칠 때 <text:span text:style-name="T1">“연속 구간”의 종단간 지연</text:span>과 <text:span text:style-name="T1">누적 바이트</text:span>를 로깅 구조(Period/FIFO 정책)에 맞춰 저장한다.</text:p>
      <text:p text:style-name="Text_20_body"><text:span text:style-name="T1">필수 — Read 멀티 트랜잭션 레이턴시</text:span></text:p>
      <text:list text:style-name="L22">
        <text:list-item>
          <text:p text:style-name="P22"><text:span text:style-name="T1">구간 시작</text:span>: 필터를 통과하는 Read 트랜잭션에 대해, <text:span text:style-name="T1">현재 Outstanding Read 트랜잭션이 없을 때</text:span>, <text:span text:style-name="T1">ARVALID &amp; ARREADY</text:span>가 성립한 시점에서 <text:span text:style-name="T1">레이턴시 카운터 시작</text:span>.<text:line-break/></text:p>
        </text:list-item>
        <text:list-item>
          <text:p text:style-name="P22"><text:span text:style-name="T1">구간 종료</text:span>: 해당 구간에 속하는 <text:span text:style-name="T1">마지막 Read 트랜잭션</text:span>에 대해 <text:span text:style-name="T1">RLAST &amp; RVALID &amp; RREADY</text:span>가 성립한 시점에서 <text:span text:style-name="T1">카운터 종료</text:span>.<text:line-break/></text:p>
        </text:list-item>
        <text:list-item>
          <text:p text:style-name="P22"><text:span text:style-name="T1">저장</text:span>: 종료 시(또는 Period 경계에서의 집계 방식 — 아래 §5.2.3) <text:span text:style-name="T1">바이트 수</text:span>와 <text:span text:style-name="T1">Period(사이클) 수</text:span>를 <text:span text:style-name="T1">저장 방식(FIFO / 평균 등)에 따라</text:span> §5.1·§5.2.1과 동일한 <text:span text:style-name="T1">Even/Odd FIFO 체계</text:span>에 맞게 저장 가능해야 한다.<text:line-break/></text:p>
        </text:list-item>
        <text:list-item>
          <text:p text:style-name="P22"><text:span text:style-name="T1">Outstanding이 이미 있는 상태</text:span>에서 새 Read가 시작되면: <text:span text:style-name="T1">이미 동작 중인 멀티 트랜잭션 레이턴시 카운터는 리셋하지 않고</text:span>, <text:span text:style-name="T1">바이트 수만 누적 증가</text:span>한다(동일 구간으로 간주).</text:p>
        </text:list-item>
      </text:list>
      <text:p text:style-name="First_20_paragraph"><text:span text:style-name="T1">필수 — Write 멀티 트랜잭션 레이턴시</text:span></text:p>
      <text:list text:style-name="L23">
        <text:list-item>
          <text:p text:style-name="P23">Read와 <text:span text:style-name="T1">동일한 정책</text:span>으로 정의한다. 구체적으로는 Write 경로에서 “구간 시작”은 Outstanding Write가 없을 때의 <text:span text:style-name="T1">AW (또는 규약에 맞는 첫 유효 요청 시점)</text:span>, “구간 종료”는 해당 구간 마지막 Write에 대한 <text:span text:style-name="T1">최종 응답(BVALID &amp; BREADY)</text:span> 으로 한다.<text:line-break/></text:p>
        </text:list-item>
        <text:list-item>
          <text:p text:style-name="P23">구간 중 추가 Write는 <text:span text:style-name="T1">카운터 리셋 없이 바이트만 가산</text:span>.</text:p>
        </text:list-item>
      </text:list>
      <text:p text:style-name="First_20_paragraph"><text:span text:style-name="T1">재량</text:span></text:p>
      <text:list text:style-name="L24">
        <text:list-item>
          <text:p text:style-name="P24">Write 멀티 구간의 바이트 산출이 AW 기준만인지 AW+W 데이터까지 포함하는지의 세부(단, 문서 전체의 바이트 정의와 <text:span text:style-name="T1">일관</text:span>되어야 함).<text:line-break/></text:p>
        </text:list-item>
        <text:list-item>
          <text:p text:style-name="P24">멀티 트랜잭션 통계를 Period <text:span text:style-name="T1">평균</text:span>으로 넣을지, <text:span text:style-name="T1">샘플 단위 FIFO</text:span>에 넣을지 — 레지스터 맵에 명시.</text:p>
        </text:list-item>
      </text:list>
      <text:h text:style-name="Heading_20_4" text:outline-level="4"><text:bookmark-start text:name="멀티-트랜잭션-통계와-period의-관계-필수일부-재량"/>5.2.3 멀티 트랜잭션 통계와 Period의 관계 (필수·일부 재량)<text:bookmark-end text:name="멀티-트랜잭션-통계와-period의-관계-필수일부-재량"/></text:h>
      <text:p text:style-name="First_20_paragraph"><text:span text:style-name="T1">필수</text:span></text:p>
      <text:list text:style-name="L25">
        <text:list-item>
          <text:p text:style-name="P25">단일/멀티 트랜잭션 지연 통계는 모두 <text:span text:style-name="T1">§4 필터</text:span>를 통과한 트랜잭션만 포함.<text:line-break/></text:p>
        </text:list-item>
        <text:list-item>
          <text:p text:style-name="P25">Bandwidth/Latency와 <text:span text:style-name="T1">동일한 Period 타임베이스</text:span>를 사용할 수 있어야 한다.</text:p>
        </text:list-item>
      </text:list>
      <text:p text:style-name="First_20_paragraph"><text:span text:style-name="T1">재량</text:span></text:p>
      <text:list text:style-name="L26">
        <text:list-item>
          <text:p text:style-name="P26">한 Period 안에서 여러 멀티 구간이 완료될 때 <text:span text:style-name="T1">평균·합·최대</text:span> 중 무엇을 저장할지는 성능 지표 정의에 따라 레지스터 맵에 확정.</text:p>
        </text:list-item>
      </text:list>
      <text:p text:style-name="Horizontal_20_Line"/>
      <text:h text:style-name="Heading_20_2" text:outline-level="2"><text:bookmark-start text:name="bandwidth-throttling"/>6. Bandwidth Throttling<text:bookmark-end text:name="bandwidth-throttling"/></text:h>
      <text:h text:style-name="Heading_20_3" text:outline-level="3"><text:bookmark-start text:name="공통"/>6.1 공통<text:bookmark-end text:name="공통"/></text:h>
      <text:p text:style-name="First_20_paragraph"><text:span text:style-name="T1">필수</text:span></text:p>
      <text:list text:style-name="L27">
        <text:list-item>
          <text:p text:style-name="P27">로깅용 Period와 <text:span text:style-name="T1">별도</text:span>로 <text:span text:style-name="Source_Text">period_throttle</text:span>(명칭 재량) 등 주기 레지스터를 둔다.<text:line-break/></text:p>
        </text:list-item>
        <text:list-item>
          <text:p text:style-name="P27">스로틀 대상 구간의 바이트 집계 방식은 로깅과 <text:span text:style-name="T1">동일한 바이트 산출 규칙</text:span>을 따른다.<text:line-break/></text:p>
        </text:list-item>
        <text:list-item>
          <text:p text:style-name="P27"><text:span text:style-name="T1">적용 범위</text:span>: §4 <text:span text:style-name="T1">주소 + ID + DIRECTION</text:span> 필터를 만족하는 트랜잭션에만 스로틀 동작.<text:line-break/></text:p>
        </text:list-item>
        <text:list-item>
          <text:p text:style-name="P27">지연 삽입으로 대역폭을 제한한다.</text:p>
        </text:list-item>
      </text:list>
      <text:p text:style-name="First_20_paragraph"><text:span text:style-name="T1">재량</text:span></text:p>
      <text:list text:style-name="L28">
        <text:list-item>
          <text:p text:style-name="P28">슬라이딩 윈도우 vs 고정 윈도우 등 집계 구현.</text:p>
        </text:list-item>
      </text:list>
      <text:p text:style-name="Horizontal_20_Line"/>
      <text:h text:style-name="Heading_20_3" text:outline-level="3"><text:bookmark-start text:name="threshold-동작-방식-옵션-필수"/>6.2 Threshold 동작 방식 옵션 (필수)<text:bookmark-end text:name="threshold-동작-방식-옵션-필수"/></text:h>
      <text:p text:style-name="First_20_paragraph">레지스터로 <text:span text:style-name="T1">동적 선택</text:span> 가능해야 한다.</text:p>
      <text:h text:style-name="Heading_20_4" text:outline-level="4"><text:bookmark-start text:name="static-threshold"/>6.2.1 Static threshold<text:bookmark-end text:name="static-threshold"/></text:h>
      <text:p text:style-name="First_20_paragraph"><text:span text:style-name="T1">필수</text:span></text:p>
      <text:list text:style-name="L29">
        <text:list-item>
          <text:p text:style-name="P29"><text:span text:style-name="Source_Text">period_throttle</text:span> 주기마다 집계한 바이트 합이 <text:span text:style-name="T1">설정 threshold</text:span>를 초과하면, AW/AR(및 §6.4) 채널에서 <text:span text:style-name="T1">ready 또는 상류 valid에 대한 수락 타이밍</text:span>을 지연하여 대역폭을 낮춘다.<text:line-break/></text:p>
        </text:list-item>
        <text:list-item>
          <text:p text:style-name="P29">AW와 AR에 서로 <text:span text:style-name="T1">다른 delay 값</text:span>을 설정 가능.</text:p>
        </text:list-item>
      </text:list>
      <text:h text:style-name="Heading_20_4" text:outline-level="4"><text:bookmark-start text:name="credit-방식-threshold"/>6.2.2 Credit 방식 threshold<text:bookmark-end text:name="credit-방식-threshold"/></text:h>
      <text:p text:style-name="First_20_paragraph"><text:span text:style-name="T1">필수 개념</text:span></text:p>
      <text:list text:style-name="L30">
        <text:list-item>
          <text:p text:style-name="P30"><text:span text:style-name="T1">credit_period</text:span>: 로깅/스태틱 period와 <text:span text:style-name="T1">독립</text:span>인 주기. 레지스터로 설정.<text:line-break/></text:p>
        </text:list-item>
        <text:list-item>
          <text:p text:style-name="P30">매 <text:span text:style-name="Source_Text">credit_period</text:span>마다 <text:span text:style-name="T1">number_of_credit</text:span>(레지스터 동적 설정)만큼 크레딧이 <text:span text:style-name="T1">추가</text:span>되고 <text:span text:style-name="T1">누적</text:span>된다.<text:line-break/></text:p>
        </text:list-item>
        <text:list-item>
          <text:p text:style-name="P30">누적값은 <text:span text:style-name="T1">상한</text:span>(레지스터 또는 파라미터로 동적 설정 가능)을 넘지 않도록 클램프.<text:line-break/></text:p>
        </text:list-item>
        <text:list-item>
          <text:p text:style-name="P30">트랜잭션 <text:span text:style-name="T1">요청이 채널에서 수락될 때</text:span>(AXI에서 <text:span text:style-name="T1">해당 채널의 VALID &amp; READY</text:span> 성립 시점으로 정의; 레지스터 문서에 채널별로 명시) 크레딧을 차감한다.<text:line-break/></text:p>
        </text:list-item>
        <text:list-item>
          <text:p text:style-name="P30">차감량 = <text:span text:style-name="T1">요청 바이트</text:span>를 <text:span text:style-name="Source_Text">credit_divider</text:span>만큼 <text:span text:style-name="T1">논리 시프트(우측)</text:span> 하여 얻는 값 — 즉 <text:span text:style-name="T1">bytes / 2^credit_divider</text:span> 의 정수 나눗셈(바닥, floor)에 상응하는 정수(bytes는 해당 트랜잭션 전송 바이트 수).<text:line-break/></text:p>
        </text:list-item>
        <text:list-item>
          <text:p text:style-name="P30">차감 결과가 <text:span text:style-name="T1">0 미만이 되지 않도록</text:span> 한다(부족하면 §6.2.3).<text:line-break/></text:p>
        </text:list-item>
        <text:list-item>
          <text:p text:style-name="P30"><text:span text:style-name="T1">Read용 크레딧</text:span>과 <text:span text:style-name="T1">Write용 크레딧</text:span>을 <text:span text:style-name="T1">분리</text:span>하여 유지·차감한다.</text:p>
        </text:list-item>
      </text:list>
      <text:p text:style-name="First_20_paragraph"><text:span text:style-name="T1">재량</text:span></text:p>
      <text:list text:style-name="L31">
        <text:list-item>
          <text:p text:style-name="P31">크레딧 단위 정수 비트 폭, 동시에 여러 트랜잭션 차감 순서.</text:p>
        </text:list-item>
      </text:list>
      <text:h text:style-name="Heading_20_4" text:outline-level="4"><text:bookmark-start text:name="크레딧-부족-시-지연-필수"/>6.2.3 크레딧 부족 시 지연 (필수)<text:bookmark-end text:name="크레딧-부족-시-지연-필수"/></text:h>
      <text:p text:style-name="First_20_paragraph"><text:span text:style-name="T1">필수</text:span></text:p>
      <text:list text:style-name="L32">
        <text:list-item>
          <text:p text:style-name="P32">차감 가능한 크레딧이 없으면 <text:span text:style-name="T1">트랜잭션 수락을 지연</text:span>시켜 대역폭을 제한한다.<text:line-break/></text:p>
        </text:list-item>
        <text:list-item>
          <text:p text:style-name="P32">Read 경로와 Write 경로에 대해 <text:span text:style-name="T1">독립적으로</text:span> 적용(분리된 크레딧과 일치).</text:p>
        </text:list-item>
      </text:list>
      <text:p text:style-name="Horizontal_20_Line"/>
      <text:h text:style-name="Heading_20_3" text:outline-level="3"><text:bookmark-start text:name="external-throttle-control"/>6.3 External throttle control<text:bookmark-end text:name="external-throttle-control"/></text:h>
      <text:p text:style-name="First_20_paragraph">AXI 버스가 아닌 <text:span text:style-name="T1">별도 핀</text:span>으로 들어오는 스로틀 지시를 받아, 내부 threshold 스로틀(§6.2)과 <text:span text:style-name="T1">독립인 지연 레지스터</text:span>로 <text:span text:style-name="T1">요청(request) 경로</text:span>에 삽입 지연을 가한다.</text:p>
      <text:h text:style-name="Heading_20_4" text:outline-level="4"><text:bookmark-start text:name="입력-및-의미-필수"/>6.3.1 입력 및 의미 (필수)<text:bookmark-end text:name="입력-및-의미-필수"/></text:h>
      <text:p text:style-name="First_20_paragraph"><text:span text:style-name="T1">필수</text:span></text:p>
      <text:list text:style-name="L33">
        <text:list-item>
          <text:p text:style-name="P33">포트 <text:span text:style-name="Source_Text">request_throttle[1:0]</text:span> (§2.4).<text:line-break/></text:p>
        </text:list-item>
        <text:list-item>
          <text:p text:style-name="P33"><text:span text:style-name="Source_Text">request_throttle == 0</text:span>: 이 기능이 enable된 경우에도 <text:span text:style-name="T1">이 입력에 의한 추가 지연은 없음</text:span>(no throttle by this selector).<text:line-break/></text:p>
        </text:list-item>
        <text:list-item>
          <text:p text:style-name="P33"><text:span text:style-name="Source_Text">request_throttle == 1</text:span><text:span text:style-name="T1">, </text:span><text:span text:style-name="Source_Text">2</text:span><text:span text:style-name="T1">, </text:span><text:span text:style-name="Source_Text">3</text:span>: 각각 <text:span text:style-name="T1">서로 다른 지연량</text:span>이 <text:span text:style-name="T1">request 신호</text:span> 수락 경로에 적용된다. 지연량은 <text:span text:style-name="T1">레지스터로 설정</text:span>하며, <text:span text:style-name="T1">§6.2·§6.4에서 사용하는 AW/AR/W delay 레지스터·크레딧 관련 설정과는 별개의 레지스터</text:span>여야 한다(필수). 즉 <text:span text:style-name="T2">외부 선택값 1·2·3에 대응하는 delay 세트</text:span>는 <text:span text:style-name="T1">전용 레지스터 3개</text:span>(또는 동등한 분리된 저장소).<text:line-break/></text:p>
        </text:list-item>
        <text:list-item>
          <text:p text:style-name="P33">본 기능의 <text:span text:style-name="T1">동작 enable/disable</text:span>은 <text:span text:style-name="T1">APB Control 레지스터로 동적 설정</text:span> 가능해야 한다(필수). enable이 꺼지면 <text:span text:style-name="Source_Text">request_throttle</text:span> 입력은 <text:span text:style-name="T1">무시</text:span>되어도 된다(SHOULD: 문서화).</text:p>
        </text:list-item>
      </text:list>
      <text:p text:style-name="First_20_paragraph"><text:span text:style-name="T1">재량</text:span></text:p>
      <text:list text:style-name="L34">
        <text:list-item>
          <text:p text:style-name="P34">“request 신호”의 구체적 범위: 일반적으로 <text:span text:style-name="T1">AR·AW 주소 단계</text:span>의 수락(VALID/READY) 타이밍에 삽입되는 지연을 의미한다. <text:span text:style-name="T1">W·R 응답</text:span>까지 확장할지는 <text:span text:style-name="T1">재량</text:span>이나, 적용 채널은 레지스터 맵에 <text:span text:style-name="T1">명시</text:span>할 것.<text:line-break/></text:p>
        </text:list-item>
        <text:list-item>
          <text:p text:style-name="P34">값 1·2·3 각각에 지연을 <text:span text:style-name="T1">한 레지스터에 인코딩</text:span>할지 <text:span text:style-name="T1">3개 독립 레지스터</text:span>로 둘지는 <text:span text:style-name="T1">재량</text:span>.</text:p>
        </text:list-item>
      </text:list>
      <text:h text:style-name="Heading_20_4" text:outline-level="4"><text:bookmark-start text:name="내부-bandwidth-throttling과의-관계-필수재량"/>6.3.2 내부 Bandwidth throttling과의 관계 (필수·재량)<text:bookmark-end text:name="내부-bandwidth-throttling과의-관계-필수재량"/></text:h>
      <text:p text:style-name="First_20_paragraph"><text:span text:style-name="T1">필수</text:span></text:p>
      <text:list text:style-name="L35">
        <text:list-item>
          <text:p text:style-name="P35">External throttle과 §6.2 내부 스로틀이 <text:span text:style-name="T1">동시에</text:span> 활성일 때, 합성 지연이 AXI <text:span text:style-name="T1">프로토콜·데드락 없이</text:span> 동작해야 한다.</text:p>
        </text:list-item>
      </text:list>
      <text:p text:style-name="First_20_paragraph"><text:span text:style-name="T1">재량</text:span></text:p>
      <text:list text:style-name="L36">
        <text:list-item>
          <text:p text:style-name="P36">지연의 <text:span text:style-name="T1">합산·최대값 선택·우선순위</text:span> 등 결합 규칙은 구현·레지스터 맵에 명시.</text:p>
        </text:list-item>
      </text:list>
      <text:h text:style-name="Heading_20_4" text:outline-level="4"><text:bookmark-start text:name="적용-범위-재량"/>6.3.3 적용 범위 (재량)<text:bookmark-end text:name="적용-범위-재량"/></text:h>
      <text:list text:style-name="L37">
        <text:list-item>
          <text:p text:style-name="P37">§4 주소/ID/DIRECTION 필터를 외부 스로틀에도 적용할지 여부는 <text:span text:style-name="T1">재량</text:span>. 적용 시에는 레지스터로 선택 가능하게 할지는 <text:span text:style-name="T1">재량</text:span>. 미명시 시 <text:span text:style-name="T1">전역(모든 트랜잭션)</text:span> 에 적용하는 구현도 허용된다.</text:p>
        </text:list-item>
      </text:list>
      <text:p text:style-name="Horizontal_20_Line"/>
      <text:h text:style-name="Heading_20_3" text:outline-level="3"><text:bookmark-start text:name="write-경로-wready-지연"/>6.4 Write 경로 — WREADY 지연<text:bookmark-end text:name="write-경로-wready-지연"/></text:h>
      <text:p text:style-name="First_20_paragraph"><text:span text:style-name="T1">필수</text:span></text:p>
      <text:list text:style-name="L38">
        <text:list-item>
          <text:p text:style-name="P38">스로틀이 Write 데이터 경로에 미치는 영향으로, <text:span text:style-name="T1">WREADY 지연</text:span>을 추가할 수 있어야 한다.<text:line-break/></text:p>
        </text:list-item>
        <text:list-item>
          <text:p text:style-name="P38">지연 <text:span text:style-name="T1">크기(사이클 또는 유사)</text:span> 는 <text:span text:style-name="T1">별도 레지스터</text:span>로 설정 가능.<text:line-break/></text:p>
        </text:list-item>
        <text:list-item>
          <text:p text:style-name="P38">Static/Credit 모드와의 조합 규칙(예: 크레딧 부족 시에만 WREADY 가산 등)은 <text:span text:style-name="T1">레지스터 맵에 명시</text:span>하고, AXI <text:span text:style-name="T1">W 채널 규약 위반 없이</text:span> 동작해야 한다.</text:p>
        </text:list-item>
      </text:list>
      <text:p text:style-name="First_20_paragraph"><text:span text:style-name="T1">재량</text:span></text:p>
      <text:list text:style-name="L39">
        <text:list-item>
          <text:p text:style-name="P39">AW 지연과 W 지연의 우선순위·합산 방식.</text:p>
        </text:list-item>
      </text:list>
      <text:p text:style-name="Horizontal_20_Line"/>
      <text:h text:style-name="Heading_20_3" text:outline-level="3"><text:bookmark-start text:name="모드-선택-및-레지스터-필수"/>6.5 모드 선택 및 레지스터 (필수)<text:bookmark-end text:name="모드-선택-및-레지스터-필수"/></text:h>
      <text:p text:style-name="First_20_paragraph"><text:span text:style-name="T1">필수</text:span></text:p>
      <text:list text:style-name="L40">
        <text:list-item>
          <text:p text:style-name="P40">§6.2.1과 §6.2.2 중 <text:span text:style-name="T1">한 모드</text:span>를 런타임에 선택.<text:line-break/></text:p>
        </text:list-item>
        <text:list-item>
          <text:p text:style-name="P40">선택에 따라 의미 없는 레지스터는 무시되어도 됨(SHOULD: 문서화).</text:p>
        </text:list-item>
      </text:list>
      <text:p text:style-name="Horizontal_20_Line"/>
      <text:h text:style-name="Heading_20_2" text:outline-level="2"><text:bookmark-start text:name="address-protection"/>7. Address Protection<text:bookmark-end text:name="address-protection"/></text:h>
      <text:p text:style-name="First_20_paragraph">Bandwidth throttle·latency log와 <text:span text:style-name="T1">별도로 enable 가능한</text:span> 기능으로 둔다.</text:p>
      <text:h text:style-name="Heading_20_3" text:outline-level="3"><text:bookmark-start text:name="보호-영역"/>7.1 보호 영역<text:bookmark-end text:name="보호-영역"/></text:h>
      <text:p text:style-name="First_20_paragraph"><text:span text:style-name="T1">필수</text:span></text:p>
      <text:list text:style-name="L41">
        <text:list-item>
          <text:p text:style-name="P41"><text:span text:style-name="T1">(base address, end address)</text:span> 쌍으로 허용 영역을 정의한다. 쌍의 <text:span text:style-name="T1">최대 개수</text:span>는 <text:span text:style-name="T1">디자인 파라미터</text:span>.<text:line-break/></text:p>
        </text:list-item>
        <text:list-item>
          <text:p text:style-name="P41">각 쌍마다 <text:span text:style-name="T1">유효(valid)</text:span> 를 동적으로 켜고 끌 수 있어야 한다.<text:line-break/></text:p>
        </text:list-item>
        <text:list-item>
          <text:p text:style-name="P41">트랜잭션 주소가 <text:span text:style-name="T1">어느 유효한 쌍에도 속하지 않으면</text:span> “보호 위반”으로 처리한다(주소 비교는 ARADDR/AWADDR 기준; 세부 <text:span text:style-name="T1">재량</text:span>).</text:p>
        </text:list-item>
      </text:list>
      <text:h text:style-name="Heading_20_3" text:outline-level="3"><text:bookmark-start text:name="graceful-ignore-동작"/>7.2 Graceful ignore 동작<text:bookmark-end text:name="graceful-ignore-동작"/></text:h>
      <text:p text:style-name="First_20_paragraph"><text:span text:style-name="T1">필수 — Read</text:span></text:p>
      <text:list text:style-name="L42">
        <text:list-item>
          <text:p text:style-name="P42">보호 위반 Read 요청에 대해 <text:span text:style-name="T1">에러 로그 레지스터</text:span>에 <text:span text:style-name="T1">AXID</text:span>, <text:span text:style-name="T1">ARADDR</text:span>를 남긴다.<text:line-break/></text:p>
        </text:list-item>
        <text:list-item>
          <text:p text:style-name="P42"><text:span text:style-name="T1">AXI 프로토콜 타이밍이 깨지지 않도록</text:span> 하류·상류와의 핸드셰이크를 완결해야 한다.<text:line-break/></text:p>
        </text:list-item>
        <text:list-item>
          <text:p text:style-name="P42">비보호 주소로의 실제 접근을 어떻게 막을지(예: 하류로 AR 미전달 + 로컬 에러 응답 생성 등)는 <text:span text:style-name="T1">재량</text:span>이나, <text:span text:style-name="T1">데드락 없음·READY/VALID 규약 준수</text:span>는 <text:span text:style-name="T1">필수</text:span>.</text:p>
        </text:list-item>
      </text:list>
      <text:p text:style-name="First_20_paragraph"><text:span text:style-name="T1">필수 — Write</text:span></text:p>
      <text:list text:style-name="L43">
        <text:list-item>
          <text:p text:style-name="P43">보호 위반 Write에 대해 에러 로그에 필요한 정보를 남긴다(최소 <text:span text:style-name="T1">AWADDR</text:span>, <text:span text:style-name="T1">AWID</text:span> 권장).<text:line-break/></text:p>
        </text:list-item>
        <text:list-item>
          <text:p text:style-name="P43">하류로 나가는 Write 데이터 경로에서 <text:span text:style-name="T1">WSTRB를 전부 0</text:span>으로 만들어 전달한다(사이클 정렬·패킹은 <text:span text:style-name="T1">재량</text:span>, <text:span text:style-name="T1">프로토콜 유지 필수</text:span>).</text:p>
        </text:list-item>
      </text:list>
      <text:h text:style-name="Heading_20_3" text:outline-level="3"><text:bookmark-start text:name="에러-로그-레지스터-형식-필수"/>7.3 에러 로그 레지스터 형식 (필수)<text:bookmark-end text:name="에러-로그-레지스터-형식-필수"/></text:h>
      <text:p text:style-name="First_20_paragraph">각 에러 소스(또는 공통) 레지스터에 다음 의미를 갖는 필드를 둔다.</text:p>
      <text:list text:style-name="L44">
        <text:list-item>
          <text:p text:style-name="P44"><text:span text:style-name="T1">valid</text:span>: 에러 이벤트 표시.<text:line-break/></text:p>
        </text:list-item>
        <text:list-item>
          <text:p text:style-name="P44"><text:span text:style-name="T1">multi</text:span>: 배타적으로 다음을 표현:</text:p>
          <text:list text:style-name="L45">
            <text:list-item>
              <text:p text:style-name="P45"><text:span text:style-name="Source_Text">valid=1</text:span>, <text:span text:style-name="Source_Text">multi=0</text:span>: <text:span text:style-name="T1">1회</text:span> 발생.<text:line-break/></text:p>
            </text:list-item>
            <text:list-item>
              <text:p text:style-name="P45"><text:span text:style-name="Source_Text">valid=1</text:span>, <text:span text:style-name="Source_Text">multi=N</text:span> (N&gt;0): <text:span text:style-name="T1">N회</text:span> 발생 누적(단, <text:span text:style-name="T1">multi 비트 폭으로 표현 가능한 상한</text:span>까지만 증가; 초과 시 <text:span text:style-name="T1">포화</text:span> 또는 <text:span text:style-name="T1">오버플로 플래그</text:span> 중 하나는 레지스터 맵에 명시 — <text:span text:style-name="T1">재량</text:span> 중 하나 선택 후 문서화).</text:p>
            </text:list-item>
          </text:list>
        </text:list-item>
      </text:list>
      <text:p text:style-name="First_20_paragraph"><text:span text:style-name="T1">필수</text:span></text:p>
      <text:list text:style-name="L46">
        <text:list-item>
          <text:p text:style-name="P46">에러 로그는 이 IP 내부의 <text:span text:style-name="T1">APB CSR 슬레이브</text:span> 접근으로 <text:span text:style-name="T1">Write-one-to-clear(W1C)</text:span> 하여 클리어 가능해야 한다.</text:p>
        </text:list-item>
      </text:list>
      <text:p text:style-name="First_20_paragraph"><text:span text:style-name="T1">재량</text:span></text:p>
      <text:list text:style-name="L47">
        <text:list-item>
          <text:p text:style-name="P47">Read/Write 에러를 분리한 레지스터 파일 vs 통합.</text:p>
        </text:list-item>
      </text:list>
      <text:p text:style-name="Horizontal_20_Line"/>
      <text:h text:style-name="Heading_20_2" text:outline-level="2"><text:bookmark-start text:name="인터럽트상태-필수-요약"/>8. 인터럽트·상태 (필수 요약)<text:bookmark-end text:name="인터럽트상태-필수-요약"/></text:h>
      <text:list text:style-name="L48">
        <text:list-item>
          <text:p text:style-name="P48">인터럽트 <text:span text:style-name="T1">1개</text:span> 라인.<text:line-break/></text:p>
        </text:list-item>
        <text:list-item>
          <text:p text:style-name="P48">로깅 FIFO 이벤트, address protection 에러 등은 <text:span text:style-name="T1">마스크 레지스터</text:span>로 묶을 수 있음(<text:span text:style-name="T1">재량</text:span>, 단 요구 기능은 소프트웨어에서 구별 가능해야 함).</text:p>
        </text:list-item>
      </text:list>
      <text:p text:style-name="Horizontal_20_Line"/>
      <text:h text:style-name="Heading_20_2" text:outline-level="2"><text:bookmark-start text:name="검증-필수"/>9. 검증 (필수)<text:bookmark-end text:name="검증-필수"/></text:h>
      <text:list text:style-name="L49">
        <text:list-item>
          <text:p text:style-name="P49">충분한 <text:span text:style-name="T1">assertion(SVA 등)</text:span> 으로 AXI 규약·본 문서의 카운터 경계 조건을 검증한다.</text:p>
        </text:list-item>
      </text:list>
      <text:p text:style-name="Horizontal_20_Line"/>
      <text:h text:style-name="Heading_20_2" text:outline-level="2"><text:bookmark-start text:name="구조-개요도"/>10. 구조 개요도<text:bookmark-end text:name="구조-개요도"/></text:h>
      <text:h text:style-name="Heading_20_3" text:outline-level="3"><text:bookmark-start text:name="블록-개요"/>10.1 블록 개요<text:bookmark-end text:name="블록-개요"/></text:h>
      <text:p text:style-name="FigureWithCaption"><draw:frame draw:name="img1" svg:width="1536.0pt" svg:height="1024.0pt"><draw:image xlink:href="Pictures/0.png" xlink:type="simple" xlink:show="embed" xlink:actuate="onLoad"/></draw:frame></text:p>
      <text:p text:style-name="FigureCaption">AXI Performance Monitor conceptual blocks</text:p>
      <text:h text:style-name="Heading_20_3" text:outline-level="3"><text:bookmark-start text:name="필터-기능-적용-참고-mermaid"/>10.2 필터 → 기능 적용 (참고 Mermaid)<text:bookmark-end text:name="필터-기능-적용-참고-mermaid"/></text:h>
      <text:p text:style-name="P50">flowchart LR</text:p>
      <text:p text:style-name="P51"><text:s text:c="2"/>subgraph filt [Filter stage]</text:p>
      <text:p text:style-name="P52"><text:s text:c="4"/>A[Address]</text:p>
      <text:p text:style-name="P53"><text:s text:c="4"/>I[ID mode]</text:p>
      <text:p text:style-name="P54"><text:s text:c="4"/>D[Direction]</text:p>
      <text:p text:style-name="P55"><text:s text:c="2"/>end</text:p>
      <text:p text:style-name="P56"><text:s text:c="2"/>filt --&gt; BW[Bandwidth log]</text:p>
      <text:p text:style-name="P57"><text:s text:c="2"/>filt --&gt; LAT[Latency incl multi-tx]</text:p>
      <text:p text:style-name="P58"><text:s text:c="2"/>filt --&gt; TH[Throttle static or credit]</text:p>
      <text:p text:style-name="P59"><text:s text:c="2"/>XTH[External request_throttle] --&gt; TH</text:p>
      <text:p text:style-name="P60"><text:s text:c="2"/>filt --&gt; AP[Address protection]</text:p>
      <text:p text:style-name="Horizontal_20_Line"/>
      <text:h text:style-name="Heading_20_2" text:outline-level="2"><text:bookmark-start text:name="구현-산출물-권장"/>11. 구현 산출물 (권장)<text:bookmark-end text:name="구현-산출물-권장"/></text:h>
      <text:p text:style-name="First_20_paragraph">IP 공급자는 구현과 함께 다음을 제공하는 것이 <text:span text:style-name="T1">권장</text:span>된다(디렉터리 구조·이름은 <text:span text:style-name="T1">재량</text:span>).</text:p>
      <text:list text:style-name="L50">
        <text:list-item>
          <text:p text:style-name="P61"><text:span text:style-name="T1">RTL 소스</text:span>: 합성·시뮬레이션 가능한 Verilog/SystemVerilog.<text:line-break/></text:p>
        </text:list-item>
        <text:list-item>
          <text:p text:style-name="P61"><text:span text:style-name="T1">사용자 문서</text:span>: 본 의뢰서와 일치하는 <text:span text:style-name="T1">제어 레지스터 설명</text:span>(비트 의미, 주소, 리셋 값), 클럭/리셋·파라미터 설명.<text:line-break/></text:p>
        </text:list-item>
        <text:list-item>
          <text:p text:style-name="P61"><text:span text:style-name="T1">검증 자료</text:span>: SVA 등 assertion, 테스트플랜 또는 검증 요약.</text:p>
        </text:list-item>
      </text:list>
      <text:p text:style-name="Horizontal_20_Line"/>
      <text:h text:style-name="Heading_20_2" text:outline-level="2"><text:bookmark-start text:name="부록-a.-용어약어axi-채널-요약"/>부록 A. 용어·약어·AXI 채널 요약<text:bookmark-end text:name="부록-a.-용어약어axi-채널-요약"/></text:h>
      <text:p text:style-name="First_20_paragraph">본 부록은 <text:span text:style-name="T1">이해를 돕기 위한 요약</text:span>이며, AXI 세부 규약은 <text:span text:style-name="T1">AMBA AXI 표준</text:span>을 따른다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용어</text:p>
            </table:table-cell>
            <table:table-cell table:style-name="TableHeaderRowCell" office:value-type="string">
              <text:p text:style-name="Table_20_Heading">설명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Upstream / Downstream</text:span></text:p>
          </table:table-cell>
          <table:table-cell table:style-name="TableRowCell" office:value-type="string">
            <text:p text:style-name="Table_20_Contents">트래픽이 흐르는 방향 기준으로, 모니터의 한쪽은 상류 마스터/슬레이브, 반대쪽은 하류. 본 문서의 “Master Up / Master Down” 명명과 대응한다.</text:p>
          </table:table-cell>
        </table:table-row>
        <table:table-row>
          <table:table-cell table:style-name="TableRowCell" office:value-type="string">
            <text:p text:style-name="Table_20_Contents"><text:span text:style-name="T1">AR / AW / R / W / B</text:span></text:p>
          </table:table-cell>
          <table:table-cell table:style-name="TableRowCell" office:value-type="string">
            <text:p text:style-name="Table_20_Contents">각각 Read 주소, Write 주소, Read 데이터, Write 데이터, Write 응답 채널.</text:p>
          </table:table-cell>
        </table:table-row>
        <table:table-row>
          <table:table-cell table:style-name="TableRowCell" office:value-type="string">
            <text:p text:style-name="Table_20_Contents"><text:span text:style-name="T1">Outstanding</text:span></text:p>
          </table:table-cell>
          <table:table-cell table:style-name="TableRowCell" office:value-type="string">
            <text:p text:style-name="Table_20_Contents">이전 트랜잭션의 응답이 완료되기 전에 다음 주소·데이터 단계가 진행 중인 상태. 본 문서 §5.2.2의 “멀티 트랜잭션 구간” 판별에 사용한다.</text:p>
          </table:table-cell>
        </table:table-row>
        <table:table-row>
          <table:table-cell table:style-name="TableRowCell" office:value-type="string">
            <text:p text:style-name="Table_20_Contents"><text:span text:style-name="T1">APB</text:span></text:p>
          </table:table-cell>
          <table:table-cell table:style-name="TableRowCell" office:value-type="string">
            <text:p text:style-name="Table_20_Contents">저속 구성용 버스. 본 IP는 <text:span text:style-name="T1">32bit APB 슬레이브</text:span>로 CSR에 접근한다고 가정한다.</text:p>
          </table:table-cell>
        </table:table-row>
        <table:table-row>
          <table:table-cell table:style-name="TableRowCell" office:value-type="string">
            <text:p text:style-name="Table_20_Contents"><text:span text:style-name="T1">CSR</text:span></text:p>
          </table:table-cell>
          <table:table-cell table:style-name="TableRowCell" office:value-type="string">
            <text:p text:style-name="Table_20_Contents">Control/Status Register, 설정·통계·에러 로그 등.</text:p>
          </table:table-cell>
        </table:table-row>
        <table:table-row>
          <table:table-cell table:style-name="TableRowCell" office:value-type="string">
            <text:p text:style-name="Table_20_Contents"><text:span text:style-name="T1">Even/Odd FIFO</text:span></text:p>
          </table:table-cell>
          <table:table-cell table:style-name="TableRowCell" office:value-type="string">
            <text:p text:style-name="Table_20_Contents">동일한 주기적 로깅 데이터를 두 개의 저장 뱅크(Even/Odd)로 번갈아 기록하여, 소프트웨어가 한 뱅크를 읽는 동안 다른 뱅크에 기록을 이어 갈 수 있게 하는 방식.</text:p>
          </table:table-cell>
        </table:table-row>
        <table:table-row>
          <table:table-cell table:style-name="TableRowCell" office:value-type="string">
            <text:p text:style-name="Table_20_Contents"><text:span text:style-name="T1">W1C</text:span></text:p>
          </table:table-cell>
          <table:table-cell table:style-name="TableRowCell" office:value-type="string">
            <text:p text:style-name="Table_20_Contents">Write 1 to Clear; 해당 비트에 1을 쓰면 플래그가 클리어되는 레지스터 동작.</text:p>
          </table:table-cell>
        </table:table-row>
        <table:table-row>
          <table:table-cell table:style-name="TableRowCell" office:value-type="string">
            <text:p text:style-name="Table_20_Contents"><text:span text:style-name="T1">SVA</text:span></text:p>
          </table:table-cell>
          <table:table-cell table:style-name="TableRowCell" office:value-type="string">
            <text:p text:style-name="Table_20_Contents">SystemVerilog Assertions.</text:p>
          </table:table-cell>
        </table:table-row>
      </table:table>
      <text:p text:style-name="First_20_paragraph"><text:span text:style-name="T1">바이트 산출</text:span>: 문서의 “AxSIZE × burst length” 등은 AXI <text:span text:style-name="T1">AWSIZE/ARSIZE</text:span> 및 <text:span text:style-name="T1">AWLEN/ARLEN</text:span> 등으로 결정되는 <text:span text:style-name="T1">트랜잭션당 전송 바이트</text:span>를 의미하며, 구체적 산식은 구현 시 AXI 규격과 일치시켜 레지스터 문서에 명시하면 된다.</text:p>
      <text:p text:style-name="Horizontal_20_Line"/>
      <text:p text:style-name="First_20_paragraph"><text:span text:style-name="T1">동반 문서</text:span>: 레지스터 맵·핀 목록·타이밍은 IP 공급자가 별도 자료로 제공하며, 본 의뢰서의 기능 요구를 충족하도록 기술한다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2026-04-29T22:19:05Z</meta:creation-date>
    <dc:date>2026-04-29T22:19:05Z</dc:date>
  </office:meta>
</office:document-meta>
</file>